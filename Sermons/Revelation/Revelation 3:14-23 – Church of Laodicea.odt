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6e2ca" officeooo:paragraph-rsid="0006e2ca"/>
    </style:style>
    <style:style style:name="P2"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6e2ca" officeooo:paragraph-rsid="0006e2ca" style:font-weight-asian="bold" style:font-weight-complex="bold"/>
    </style:style>
    <style:style style:name="P3" style:family="paragraph" style:parent-style-name="Standard">
      <style:paragraph-properties fo:line-height="200%" fo:text-align="left" style:justify-single-word="false" fo:text-indent="0.5in" style:auto-text-indent="true"/>
      <style:text-properties style:text-underline-style="none" fo:font-weight="normal" officeooo:rsid="0006e2ca" officeooo:paragraph-rsid="0006e2ca" style:font-weight-asian="normal" style:font-weight-complex="normal"/>
    </style:style>
    <style:style style:name="P4"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86d3e" officeooo:paragraph-rsid="00086d3e" style:font-weight-asian="bold" style:font-weight-complex="bold"/>
    </style:style>
    <style:style style:name="P5" style:family="paragraph" style:parent-style-name="Standard">
      <style:paragraph-properties fo:line-height="200%" fo:text-align="left" style:justify-single-word="false" fo:text-indent="0.5in" style:auto-text-indent="true"/>
      <style:text-properties style:text-underline-style="none" fo:font-weight="normal" officeooo:rsid="00086d3e" officeooo:paragraph-rsid="00086d3e" style:font-weight-asian="normal" style:font-weight-complex="normal"/>
    </style:style>
    <style:style style:name="P6"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b05c3" officeooo:paragraph-rsid="000b05c3" style:font-weight-asian="bold" style:font-weight-complex="bold"/>
    </style:style>
    <style:style style:name="P7" style:family="paragraph" style:parent-style-name="Standard">
      <style:paragraph-properties fo:line-height="200%" fo:text-align="left" style:justify-single-word="false" fo:text-indent="0.5in" style:auto-text-indent="true"/>
      <style:text-properties style:text-underline-style="none" fo:font-weight="normal" officeooo:rsid="000b05c3" officeooo:paragraph-rsid="000b05c3" style:font-weight-asian="normal" style:font-weight-complex="normal"/>
    </style:style>
    <style:style style:name="P8" style:family="paragraph" style:parent-style-name="Standard">
      <style:paragraph-properties fo:margin-left="0in" fo:line-height="200%" fo:text-align="left" style:justify-single-word="false" fo:text-indent="0in" style:auto-text-indent="true"/>
      <style:text-properties style:text-underline-style="solid" style:text-underline-width="auto" style:text-underline-color="font-color" fo:font-weight="bold" officeooo:rsid="000c19b4" officeooo:paragraph-rsid="000c19b4" style:font-weight-asian="bold" style:font-weight-complex="bold"/>
    </style:style>
    <style:style style:name="P9" style:family="paragraph" style:parent-style-name="Standard">
      <style:paragraph-properties fo:margin-left="0in" fo:line-height="200%" fo:text-align="left" style:justify-single-word="false" fo:text-indent="0in" style:auto-text-indent="true"/>
      <style:text-properties style:text-underline-style="none" fo:font-weight="normal" officeooo:rsid="000c19b4" officeooo:paragraph-rsid="000c19b4" style:font-weight-asian="normal" style:font-weight-complex="normal"/>
    </style:style>
    <style:style style:name="T1" style:family="text">
      <style:text-properties style:text-position="super 58%"/>
    </style:style>
    <style:style style:name="T2" style:family="text">
      <style:text-properties officeooo:rsid="00086d3e"/>
    </style:style>
    <style:style style:name="T3" style:family="text">
      <style:text-properties officeooo:rsid="0009735a"/>
    </style:style>
    <style:style style:name="T4" style:family="text">
      <style:text-properties officeooo:rsid="000b05c3"/>
    </style:style>
    <style:style style:name="T5" style:family="text">
      <style:text-properties officeooo:rsid="000c19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elation 3:14-23 – Church of Laodicea</text:p>
      <text:p text:style-name="P2">Preface</text:p>
      <text:p text:style-name="P3"><text:tab/>Before we begin, let us look back at what has happened thus far in this book. We see the Risen Lord Jesus in all of His glory speaking to the Apostle John, telling him to write down all he sees and hears. He is told to inscribe a letter to each of the 7 churches in Asia Minor. All but two of these letters have commendations and condemnations. Only Smyrna and Philadelphia are not chastised for anything. This week we end with the 7<text:span text:style-name="T1">th</text:span> and final church. It is quite possibly the most famous in our day and age as the Laodician church resembles Christianity a lot in today’s time. Let us begin</text:p>
      <text:p text:style-name="P2">Vs. 14</text:p>
      <text:p text:style-name="P3"><text:tab/>A. So this is the last description of that Christ gives of himself in these churches. He calls Himself the Amen, Faith and true witness and ruler of God’s creation.</text:p>
      <text:p text:style-name="P3"><text:tab/>B. This description is a good final description, He is the ruler of everything. He is the Amen. Amen is a word which means all of heaven agrees. Which is why we should never use that word flippantly.</text:p>
      <text:p text:style-name="P3"><text:tab/>C. The faithful and true witness. He witnessed humanity in all of its ugliness and its beauty, He witnessed God in all of His beauty and wonder. He is faithful. He is our Savior and he is reminding this church of that</text:p>
      <text:p text:style-name="P2">Vs. 15</text:p>
      <text:p text:style-name="P3"><text:tab/>A. This is a church just going through the motions. A contrast to what the Church in Philadelphia is like, this church is just there. They have moments of love but is it restrained.</text:p>
      <text:p text:style-name="P3"><text:tab/>B. There are a lot of similarities with the modern day church. For the longest time we have just had the leave us alone and we will leave you alone attitude.</text:p>
      <text:p text:style-name="P3"><text:tab/>C. Their deeds are not hot or cold. They are trying to please everyone. Unfortunately we were told by Jesus in Matthew 6:24 “No man can serve two masters…”</text:p>
      <text:p text:style-name="P2"/>
      <text:p text:style-name="P2"><text:soft-page-break/>Vs. 16</text:p>
      <text:p text:style-name="P3"><text:tab/>A. No one likes lukewarm drinks. It is unfulfilling. It is not refreshing and it is not something that people look forward to. <text:span text:style-name="T2">This church was like this to Jesus.</text:span></text:p>
      <text:p text:style-name="P3"><text:tab/><text:span text:style-name="T2">B. A lot of Christians today are lukewarm. They are even called as much. It is a dangerous place for us to be in. People who say they love Jesus but do not want to offend anyone by speaking the truth are a danger not only to themselves but others who are not Christian.</text:span></text:p>
      <text:p text:style-name="P3"><text:tab/><text:span text:style-name="T2">C. Everyone here knows what is like to have something non-palatable in your mouth. Your first reaction is to spit it out. Jesus is saying if you are a lukewarm Christian, He does not want you around. </text:span></text:p>
      <text:p text:style-name="P4">Vs. 17</text:p>
      <text:p text:style-name="P5"><text:tab/>A. This describes American Christianity almost perfectly. We are a rich country, we have really rich churches, and Jesus has been forgotten in a lot of them. Unlike the most of the world who has to fully rely on God for everything, Americans don’t see a need to rely on God for anything.</text:p>
      <text:p text:style-name="P5"><text:tab/>B. Just because you do not see a need for Jesus, does not mean you do not need him. We all need Jesus, worldly wealth will pass away, worldly goods will pass away, only Christ remains. Without him we are just wretched, pitiful, poor, blind and naked going through this world.</text:p>
      <text:p text:style-name="P5"><text:tab/>C. Jesus is not telling this church, and us these things to put us down, it is to make us and to make them realize that they do need Him. Jesus never spanks us because He hates us, a parent does not discipline a child out of hate, but out of love</text:p>
      <text:p text:style-name="P4">Vs. 18</text:p>
      <text:p text:style-name="P5"><text:tab/><text:span text:style-name="T3">A. </text:span><text:span text:style-name="T4">There are many references to fire in the Word of God. Many people will look at fire and automatically think of Hellfire, but here is prime example of what fire is supposed to be used for. It is for refining. </text:span></text:p>
      <text:p text:style-name="P5"><text:tab/><text:span text:style-name="T4">B. I Corinthians 3:13-15 “13 their work will be shown for what it is, because the Day will bring it to light. It will be revealed with fire, and the fire will test the quality of each person’s work. 14 If </text:span><text:soft-page-break/><text:span text:style-name="T4">what has been built survives, the builder will receive a reward. 15 If it is burned up, the builder will suffer loss but yet will be saved—even though only as one escaping through the flames.”</text:span></text:p>
      <text:p text:style-name="P5"><text:tab/><text:span text:style-name="T4">C. We see after repentance comes heavenly wealth, heavenly peace and holiness. You are no longer naked but clothed in all white or holiness and purity. We do not do this ourselves but it is Christ’s work through us.</text:span></text:p>
      <text:p text:style-name="P5"><text:tab/><text:span text:style-name="T4">D. And salve on our eyes is evident. It is a healing agent that allows us to see Him fully and completely.</text:span></text:p>
      <text:p text:style-name="P6">Vs. 19</text:p>
      <text:p text:style-name="P7"><text:tab/>A. Jesus states here something that all parents have told their children at one point or another. We rebuke and discipline out of love not hate. Jesus only asks for acknowledgment and repentance of wrong doings. </text:p>
      <text:p text:style-name="P7"><text:tab/>B. Throughout the history of Christianity and the History of Israel, God has shown His patience and love, sometimes this had to happen through rebuke and discipline. We as Americans are being disciplined because of our flippant attitude towards Christ these last 30-40 years. (America as a whole not necessarily each individual.)</text:p>
      <text:p text:style-name="P6">Vs. 20</text:p>
      <text:p text:style-name="P7"><text:tab/>A. Countless souls have been saved due to this verse over the centuries. Jesus is always willing to come into your heart. He knocks and it is your responsibility to open the door. He does not force Himself on anyone</text:p>
      <text:p text:style-name="P7"><text:tab/>B. Each person in this world will have a chance of repentance. Do not listen to the naysayers. God reveals himself first through nature <text:span text:style-name="T5">and creation</text:span>, then through <text:span text:style-name="T5">scripture so no one is without excuse before Him. </text:span></text:p>
      <text:p text:style-name="P8">Vs 21-22</text:p>
      <text:p text:style-name="P9"><text:soft-page-break/><text:tab/>A. This may seem odd to us in this day in age. We could not possibly sit in the place with Christ we are low, retched, but Jesus said He will give us the right to sit on the throne, which means He is giving us authority.</text:p>
      <text:p text:style-name="P9"><text:tab/>B. We can reckon back to a promise that was made in 1 Corinthians 6:3 “ Know ye not that we shall judge angels? how much more things that pertain to this life?” This statement made by Paul perfectly illustrates our new position in Heaven.</text:p>
      <text:p text:style-name="P9"><text:tab/>C. The promise to possibly the worst of all the churches is a place of authority if they repent. This should give all of us hope in Christ. As we all fail, and fail and fail again, but Christ keeps telling us to get back up and get back on track.</text:p>
      <text:p text:style-name="P8">Closing</text:p>
      <text:p text:style-name="P9">This week we looked at the last of the 7 churches, possibly the most famous of them and the worst of them. Like Christianity today, the Laodician church has forgot why they were there. They just went though the motions, and tried to be as non-offensive as possible. The Christian church as a whole is like this in our day and age. We as a church have to remember why we all gather, why we all are aloud to live. It is not because of us it is because of the love of Christ. Next week we will start on the beginning of what people often think of when they think of revelation.</text:p>
      <text:p text:style-name="P8">Pray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9T20:02:23.949841067</meta:creation-date>
    <dc:title>default</dc:title>
    <meta:editing-duration>PT8M47S</meta:editing-duration>
    <meta:editing-cycles>2</meta:editing-cycles>
    <meta:generator>LibreOffice/26.2.1.1$Linux_X86_64 LibreOffice_project/620$Build-1</meta:generator>
    <dc:date>2026-06-19T21:05:01.505580510</dc:date>
    <meta:document-statistic meta:table-count="0" meta:image-count="0" meta:object-count="0" meta:page-count="4" meta:paragraph-count="37" meta:word-count="1218" meta:character-count="6413" meta:non-whitespace-character-count="5204"/>
    <meta:template xlink:type="simple" xlink:actuate="onRequest" xlink:title="default" xlink:href="../../../../../../Templates/default.ott" meta:date="2026-06-19T20:02:23.595883148"/>
  </office:meta>
</office:document-meta>
</file>