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b01d3" officeooo:paragraph-rsid="001b01d3"/>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b01d3" officeooo:paragraph-rsid="001b01d3"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1b01d3" officeooo:paragraph-rsid="001b01d3"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fo:font-style="italic" style:text-underline-style="solid" style:text-underline-width="auto" style:text-underline-color="font-color" fo:font-weight="normal" officeooo:rsid="001c3d44" officeooo:paragraph-rsid="001c3d44" style:font-style-asian="italic" style:font-weight-asian="normal" style:font-style-complex="italic" style:font-weight-complex="normal"/>
    </style:style>
    <style:style style:name="P5"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c3d44" officeooo:paragraph-rsid="001c3d44" style:font-weight-asian="bold" style:font-weight-complex="bold"/>
    </style:style>
    <style:style style:name="P6" style:family="paragraph" style:parent-style-name="Standard">
      <style:paragraph-properties fo:line-height="200%" fo:text-align="left" style:justify-single-word="false" fo:text-indent="0.5in" style:auto-text-indent="true"/>
      <style:text-properties style:text-underline-style="none" fo:font-weight="normal" officeooo:rsid="001c3d44" officeooo:paragraph-rsid="001c3d44" style:font-weight-asian="normal" style:font-weight-complex="normal"/>
    </style:style>
    <style:style style:name="P7"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d35a7" officeooo:paragraph-rsid="001d35a7" style:font-weight-asian="bold" style:font-weight-complex="bold"/>
    </style:style>
    <style:style style:name="P8" style:family="paragraph" style:parent-style-name="Standard">
      <style:paragraph-properties fo:line-height="200%" fo:text-align="left" style:justify-single-word="false" fo:text-indent="0.5in" style:auto-text-indent="true"/>
      <style:text-properties fo:font-style="italic" style:text-underline-style="none" fo:font-weight="normal" officeooo:rsid="001d35a7" officeooo:paragraph-rsid="001d35a7" style:font-style-asian="italic" style:font-weight-asian="normal" style:font-style-complex="italic" style:font-weight-complex="normal"/>
    </style:style>
    <style:style style:name="P9" style:family="paragraph" style:parent-style-name="Standard">
      <style:paragraph-properties fo:line-height="200%" fo:text-align="left" style:justify-single-word="false" fo:text-indent="0.5in" style:auto-text-indent="true"/>
      <style:text-properties fo:font-style="normal" style:text-underline-style="none" fo:font-weight="normal" officeooo:rsid="001d35a7" officeooo:paragraph-rsid="001d35a7" style:font-style-asian="normal" style:font-weight-asian="normal" style:font-style-complex="normal" style:font-weight-complex="normal"/>
    </style:style>
    <style:style style:name="P10"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d35a7" officeooo:paragraph-rsid="001d35a7" style:font-style-asian="normal" style:font-weight-asian="bold" style:font-style-complex="normal" style:font-weight-complex="bold"/>
    </style:style>
    <style:style style:name="P11"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e85a2" officeooo:paragraph-rsid="001e85a2" style:font-style-asian="normal" style:font-weight-asian="bold" style:font-style-complex="normal" style:font-weight-complex="bold"/>
    </style:style>
    <style:style style:name="P12" style:family="paragraph" style:parent-style-name="Standard">
      <style:paragraph-properties fo:line-height="200%" fo:text-align="left" style:justify-single-word="false" fo:text-indent="0.5in" style:auto-text-indent="true"/>
      <style:text-properties fo:font-style="italic" style:text-underline-style="none" fo:font-weight="bold" officeooo:rsid="001e85a2" officeooo:paragraph-rsid="001e85a2" style:font-style-asian="italic" style:font-weight-asian="bold" style:font-style-complex="italic" style:font-weight-complex="bold"/>
    </style:style>
    <style:style style:name="P13" style:family="paragraph" style:parent-style-name="Standard">
      <style:paragraph-properties fo:line-height="200%" fo:text-align="left" style:justify-single-word="false" fo:text-indent="0.5in" style:auto-text-indent="true"/>
      <style:text-properties fo:font-style="normal" style:text-underline-style="none" fo:font-weight="normal" officeooo:rsid="001e85a2" officeooo:paragraph-rsid="001e85a2" style:font-style-asian="normal" style:font-weight-asian="normal" style:font-style-complex="normal" style:font-weight-complex="normal"/>
    </style:style>
    <style:style style:name="T1" style:family="text">
      <style:text-properties officeooo:rsid="001d35a7"/>
    </style:style>
    <style:style style:name="T2" style:family="text">
      <style:text-properties officeooo:rsid="001c3d44"/>
    </style:style>
    <style:style style:name="T3" style:family="text">
      <style:text-properties fo:font-style="normal" style:font-style-asian="normal" style:font-style-complex="normal"/>
    </style:style>
    <style:style style:name="T4" style:family="text">
      <style:text-properties officeooo:rsid="001e85a2"/>
    </style:style>
    <style:style style:name="T5"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2:8-17 – Smyrna and Pergamum</text:p>
      <text:p text:style-name="P2">Preface</text:p>
      <text:p text:style-name="P3"><text:tab/>Last week we began with the letters to the churches in Revelation. We spoke about Ephesus and we are to be in the church today. We are told we are to persevere. Like many other things in church history we are also supposed to stamp out false teaching. There is still a lot of false teachings in “churches” in today’s time and it has been the same since Christianities inception. We are to, as a church, call out such teaching and if the teaching is unfamiliar we are to always fall back on scripture since that is where all of our teaching comes from and God’s Word is unchanging. This week we look at two churches the Church in Smyrna and church in Pergamum/<text:span text:style-name="T1">Pergamos</text:span>. </text:p>
      <text:p text:style-name="P2">Vs. 8-9</text:p>
      <text:p text:style-name="P3"><text:tab/>A. Again, the Triune God is speaking directly through these letters. The Alpha and Omega or First and Last.</text:p>
      <text:p text:style-name="P3"><text:tab/>B. This is where I feel that church history has a place in these churches. We can see the suffering church under Nero and other Roman dictators in this church. We can also see Asian and African churches in today’s church world.</text:p>
      <text:p text:style-name="P3"><text:tab/>C. Back in those days, a lot of people claimed Jewish heritage to infiltrate the church. Most churches started by Paul were originally full of believing Jews. Then when Paul went on his mission trips Greeks started getting saved as well. People of Jewish heritage even in today’s Christian church feel that they are above other gentile Christians.</text:p>
      <text:p text:style-name="P3"><text:tab/>D. Remember Galatians 3:28 “There is neither Jew nor Greek, there is neither bond nor free, there is neither male nor female: for ye are all one in Christ Jesus.”. There really is no distinction of persons as it also says in Acts 10:34</text:p>
      <text:p text:style-name="P2">Vs. 10-<text:span text:style-name="T2">11</text:span></text:p>
      <text:p text:style-name="P3"><text:soft-page-break/><text:tab/>A. <text:span text:style-name="T2">There were 10 distinct persecutions under Roman Emperors in Early Christendom. From Nero to Diocletian. Churches were destroyed, Christians were imprisoned and executed. Again Christians were used in pagan ceremonies </text:span></text:p>
      <text:p text:style-name="P3"><text:tab/><text:span text:style-name="T2">B. We are told that in heaven we will get certain crowns signifying things we go through on this earth. The crown of victory is one of these crowns. Again, we cannot say we earned them in Heaven because with Christ we would not have the strength to withstand Satan. </text:span></text:p>
      <text:p text:style-name="P3"><text:tab/><text:span text:style-name="T2">C. We are shown here by Christ that those who suffer for the sake of Christ are not forgotten. We will see later on in Revelation there is a reckoning for those who treat Christians unfairly and without compassion.</text:span></text:p>
      <text:p text:style-name="P3"><text:tab/><text:span text:style-name="T2">D. verse 11 spells out that eternity is what is gained, not hurt by the second death means that there is not second death for the Christians we have life eternal through Christ. </text:span></text:p>
      <text:p text:style-name="P4">-------------------------------------------------------------------------------------------------------------------</text:p>
      <text:p text:style-name="P5">Vs 12-13</text:p>
      <text:p text:style-name="P6"><text:tab/>A. This introduction tells you all you need to know about the church in Perg<text:span text:style-name="T1">amos/Pergamum</text:span>. A sharp, double-edged sword, or two-edged sword if you will. It is a weapon and Jesus is letting this church know right from the get go, Jesus is going to war for this church.</text:p>
      <text:p text:style-name="P6"><text:tab/>B. <text:span text:style-name="T1">Pergamos was a major center for the Greek god Zeus (head of all gods), and Aesculapius (god of healing) and Roman emperor. This city was filled with idolatry and persecution. It was not the safest city to live in for Christians.</text:span></text:p>
      <text:p text:style-name="P6"><text:tab/><text:span text:style-name="T1">C. Antipas was a first Century Martyr for Jesus. He was a major figure in Christianity in that city, but we are shown that the church there did not loose faith or did not renounce Christ. </text:span></text:p>
      <text:p text:style-name="P7">Vs. 14-15</text:p>
      <text:p text:style-name="P8"><text:tab/><text:span text:style-name="T3">A. Balaam, or Baal, or Balak. The same god with a different name. Was an ancient pagan god in Israel who Israelite’s sacrificed children to. It is equivalent to modern day abortion. Instead of worshiping Balaam directly we do it indirectly and call it “choice”. </text:span></text:p>
      <text:p text:style-name="P9"><text:soft-page-break/><text:tab/>B. This is a stern warming to the churches even today. If you call yourself a Christian or even worse teach in a pulpit and teach that abortion is <text:span text:style-name="T4">alright</text:span>, you are to be thrown out. We are to always follow the word of God no matter what our feelings may be. </text:p>
      <text:p text:style-name="P9"><text:tab/>C. This does not mean those people are dammed forever but they have to repent, and turn away from such teachings. </text:p>
      <text:p text:style-name="P9"><text:s/><text:tab/>D. Again we see the Nicolaitans, brought up. They were a major problem in that society. As the same spiritual only teaching is taught in today’s society, we just called it the prosperity gospel.</text:p>
      <text:p text:style-name="P10">Vs. 16</text:p>
      <text:p text:style-name="P9"><text:tab/>A. The stern warning, either repent or face the wrath of God. This is not a soft threat, Jesus is clearly saying He is ready and willing to use the sword to cut those people off. Like the church Ephesus, Jesus is not afraid of ultimatums. The world is black or white, good or bad, there is not grey area that most of us live in. </text:p>
      <text:p text:style-name="P9"><text:tab/>B. <text:span text:style-name="T4">All of us know that there is good and evil, but a lot of compromise on things for the sake of peace. We are shown here there is no compromises. I realize that we are all human and will inevitably sin, but we are to repent...constantly. </text:span></text:p>
      <text:p text:style-name="P11">Vs. 17</text:p>
      <text:p text:style-name="P12"><text:tab/><text:span text:style-name="T5">A. Hidden mana, We should all know that mana was given to the Israelites during their time in the desert before entering Israel. For those who refused to eat sacrificed food in Pergamos, Jesus will give them food from heaven. This part is simply.</text:span></text:p>
      <text:p text:style-name="P13"><text:tab/>B. Now the controversial part. The stone. Guess what although there is speculation we do not know what this white stone is. A white stone in Grecian times represented innocence in a court case. This is the simply symbolism here, but the actual stone no one knows, only the one who has it an God.</text:p>
      <text:p text:style-name="P13"><text:tab/>C. A new name. We can see in the bible certain people are given new names. We can see Jacob whose name means supplanter, and was changed to Israel. Israel means God prevails, Abram’s name <text:soft-page-break/>was changed to Abraham to mean father of many nations, and Sarai was changed to Sarah meaning noblewoman, and of course the most famous Simon being changed to Peter meaning rock. </text:p>
      <text:p text:style-name="P13"><text:tab/>D. This is probably much of the same this person will have a new name based on what they have done for Christ. </text:p>
      <text:p text:style-name="P11">Closing</text:p>
      <text:p text:style-name="P13"><text:tab/>Two different churches this week, but the same problems we are still dealing with. The Christian church of today’s world suffers persecution on a scale never seen before. There are more Martyrs in today’s church than the previous times combined. We are told that false teachings have always been in the church and are told to stamp them out so they stop growing. Christ does not mess around when it comes to biblical teaching, He is not afraid to remove a churches protection if it becomes false. The things we do in this world have eternal consequences as we can see. Whether we receive a crown or a second death is dependent upon who we are putting our trust and faith in. </text:p>
      <text:p text:style-name="P11">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3T13:07:41.652030884</meta:creation-date>
    <dc:title>default</dc:title>
    <meta:editing-duration>PT1S</meta:editing-duration>
    <meta:editing-cycles>2</meta:editing-cycles>
    <meta:generator>LibreOffice/26.2.1.1$Linux_X86_64 LibreOffice_project/620$Build-1</meta:generator>
    <dc:date>2026-05-23T13:59:51.210619218</dc:date>
    <meta:document-statistic meta:table-count="0" meta:image-count="0" meta:object-count="0" meta:page-count="4" meta:paragraph-count="34" meta:word-count="1163" meta:character-count="6481" meta:non-whitespace-character-count="5314"/>
    <meta:template xlink:type="simple" xlink:actuate="onRequest" xlink:title="default" xlink:href="../../../../Templates/default.ott" meta:date="2026-05-23T13:07:41.271340969"/>
  </office:meta>
</office:document-meta>
</file>