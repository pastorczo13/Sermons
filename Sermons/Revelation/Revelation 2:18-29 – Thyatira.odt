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automatic-styles>
    <style:style style:name="P1" style:family="paragraph" style:parent-style-name="Standard">
      <style:paragraph-properties fo:line-height="200%" fo:text-align="center" style:justify-single-word="false" fo:text-indent="0.5in" style:auto-text-indent="true"/>
      <style:text-properties officeooo:rsid="001bd503" officeooo:paragraph-rsid="001bd503"/>
    </style:style>
    <style:style style:name="P2"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1bd503" officeooo:paragraph-rsid="001bd503" style:font-weight-asian="bold" style:font-weight-complex="bold"/>
    </style:style>
    <style:style style:name="P3" style:family="paragraph" style:parent-style-name="Standard">
      <style:paragraph-properties fo:line-height="200%" fo:text-align="left" style:justify-single-word="false" fo:text-indent="0.5in" style:auto-text-indent="true"/>
      <style:text-properties style:text-underline-style="none" fo:font-weight="normal" officeooo:rsid="001bd503" officeooo:paragraph-rsid="001bd503" style:font-weight-asian="normal" style:font-weight-complex="normal"/>
    </style:style>
    <style:style style:name="P4"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1e8991" officeooo:paragraph-rsid="001e8991" style:font-weight-asian="bold" style:font-weight-complex="bold"/>
    </style:style>
    <style:style style:name="P5" style:family="paragraph" style:parent-style-name="Standard">
      <style:paragraph-properties fo:line-height="200%" fo:text-align="left" style:justify-single-word="false" fo:text-indent="0.5in" style:auto-text-indent="true"/>
      <style:text-properties style:text-underline-style="none" fo:font-weight="normal" officeooo:rsid="001bd503" officeooo:paragraph-rsid="001e8991" style:font-weight-asian="normal" style:font-weight-complex="normal"/>
    </style:style>
    <style:style style:name="P6" style:family="paragraph" style:parent-style-name="Standard">
      <style:paragraph-properties fo:line-height="200%" fo:text-align="left" style:justify-single-word="false" fo:text-indent="0.5in" style:auto-text-indent="true"/>
      <style:text-properties style:text-underline-style="none" fo:font-weight="normal" officeooo:rsid="001e8991" officeooo:paragraph-rsid="001e8991" style:font-weight-asian="normal" style:font-weight-complex="normal"/>
    </style:style>
    <style:style style:name="P7"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1fc034" officeooo:paragraph-rsid="001fc034" style:font-weight-asian="bold" style:font-weight-complex="bold"/>
    </style:style>
    <style:style style:name="P8" style:family="paragraph" style:parent-style-name="Standard">
      <style:paragraph-properties fo:line-height="200%" fo:text-align="left" style:justify-single-word="false" fo:text-indent="0.5in" style:auto-text-indent="true"/>
      <style:text-properties style:text-underline-style="none" fo:font-weight="normal" officeooo:rsid="001fc034" officeooo:paragraph-rsid="001fc034" style:font-weight-asian="normal" style:font-weight-complex="normal"/>
    </style:style>
    <style:style style:name="P9"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200a5f" officeooo:paragraph-rsid="00200a5f" style:font-weight-asian="bold" style:font-weight-complex="bold"/>
    </style:style>
    <style:style style:name="P10" style:family="paragraph" style:parent-style-name="Standard">
      <style:paragraph-properties fo:line-height="200%" fo:text-align="left" style:justify-single-word="false" fo:text-indent="0.5in" style:auto-text-indent="true"/>
      <style:text-properties style:text-underline-style="none" fo:font-weight="normal" officeooo:rsid="00200a5f" officeooo:paragraph-rsid="00200a5f" style:font-weight-asian="normal" style:font-weight-complex="normal"/>
    </style:style>
    <style:style style:name="P11"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21331a" officeooo:paragraph-rsid="0021331a" style:font-weight-asian="bold" style:font-weight-complex="bold"/>
    </style:style>
    <style:style style:name="P12" style:family="paragraph" style:parent-style-name="Standard">
      <style:paragraph-properties fo:line-height="200%" fo:text-align="left" style:justify-single-word="false" fo:text-indent="0.5in" style:auto-text-indent="true"/>
      <style:text-properties style:text-underline-style="none" fo:font-weight="normal" officeooo:rsid="0021331a" officeooo:paragraph-rsid="0021331a" style:font-weight-asian="normal" style:font-weight-complex="normal"/>
    </style:style>
    <style:style style:name="T1" style:family="text">
      <style:text-properties officeooo:rsid="001dc82f"/>
    </style:style>
    <style:style style:name="T2" style:family="text">
      <style:text-properties officeooo:rsid="001e8991"/>
    </style:style>
    <style:style style:name="T3" style:family="text">
      <style:text-properties officeooo:rsid="001fc034"/>
    </style:style>
    <style:style style:name="T4" style:family="text">
      <style:text-properties officeooo:rsid="0021331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velation 2:18-29 – Thyatira</text:p>
      <text:p text:style-name="P2">Preface</text:p>
      <text:p text:style-name="P3"><text:tab/>As we begin and end with just one church today, we can look back at what has been written so far. We see that every one of these letters to the churches are from our Lord and Savior Jesus Christ. We see that this book of Revelation is to be read aloud until the return of Christ Himself. We see that each church has an angel overseeing its leadership and members, and that Jesus is not afraid to take its influence away due to sin. We are reminded, that even though we are all sinners, and that we are all unworthy of Christ and forgiveness, He gave it to us anyway. Let us begin today with the Church in Thyatira</text:p>
      <text:p text:style-name="P2">Vs. 18-<text:span text:style-name="T1">19</text:span></text:p>
      <text:p text:style-name="P3"><text:tab/>A. <text:span text:style-name="T1">Whose eyes are like a flame of fire (or blazing fire), and whose feet are like fine brass, We can clearly see an image of someone powerful and intense. Bronze or brass glistens in the light and shows royalty. </text:span></text:p>
      <text:p text:style-name="P3"><text:tab/><text:span text:style-name="T1">B. We see an image of Jesus here that is unlike what we saw in the Gospels. We saw glimpses of it, but never like this. He has a mission to accomplish.</text:span></text:p>
      <text:p text:style-name="P3"><text:tab/><text:span text:style-name="T1">C. The comforting part of all these letters is that Jesus does see the things we are doing right. Unlike the world, who focuses mainly on the negative, Jesus points out our positives. </text:span><text:span text:style-name="T2">He shows at the end of the verse that we grow as time goes on, and He sees it.</text:span></text:p>
      <text:p text:style-name="P3"><text:tab/><text:span text:style-name="T1">D. He is never looking at us to condemn us, He never disciples to send us to hell, He disciplines us to conform us to His image. </text:span></text:p>
      <text:p text:style-name="P4">Vs. 20</text:p>
      <text:p text:style-name="P3"><text:tab/><text:span text:style-name="T2">A. We do not know who this woman is, but Jesus is bringing up an old name Jezebel from 1 Kings. She was the wife of Ahab, King of Israel and was co-ruler with him if you will. She was a harlot, she killed the prophets of the Lord, and she allowed prophets of Baal to eat at her table. (1 Kings 18:13 &amp; 19)</text:span></text:p>
      <text:p text:style-name="P5"><text:soft-page-break/><text:tab/><text:span text:style-name="T2">B. So this woman in Thyatira had the same spirit that was in Jezebel. Remember we all have things that influence us outside of what we can see. This does not mean we can be possessed as Christians but we can be oppressed.</text:span></text:p>
      <text:p text:style-name="P6"><text:tab/>C. In Thyatira, this women as claiming to be a prophet and was practicing pagan rituals inside of that church. <text:s/></text:p>
      <text:p text:style-name="P4">Vs. 21</text:p>
      <text:p text:style-name="P6"><text:tab/>A. This is very important for us as Christians, we are never to condemn someone, that is the Lord’s job. We are to always offer repentance unto the Lord. Many of us are guilty of just looking and listening to someone and casting them off as a lost cause. Jesus, again, will leave the 99 to go get the one. </text:p>
      <text:p text:style-name="P6"><text:tab/>B. An unwilling person who will not repent, is to be cast out of the church. This is not an option. It hurts, it is disheartening, but for the greater good of the Christian body it has to be done. Most of the time the person leaves voluntarily. They do not like things that are holy so they cannot stay.</text:p>
      <text:p text:style-name="P4">Vs. 22-23</text:p>
      <text:p text:style-name="P6"><text:tab/>A. When someone is turned over to the Lord for punishment after non-repentance we see the outcome here. A bed of tribulation or some versions read suffering. Either word you use, you can see the imagery. </text:p>
      <text:p text:style-name="P6"><text:tab/>B. And those who commit adultery with her. This particular woman and those members may have committed adultery, but for us in the church today we can take this as if we allow someone who teaches a different gospel, and then follow that person, we are all accursed as it says in <text:span text:style-name="T3">Galatians 1:8</text:span></text:p>
      <text:p text:style-name="P6"><text:tab/><text:span text:style-name="T3">C. The great part about this is there is always hope, there is always a hope of repentance. We know that most will not repent, but the option is always there. God is long-suffering and wishes that none shall perish but all come to repentance. (2 Peter 3:9). </text:span></text:p>
      <text:p text:style-name="P6"><text:soft-page-break/><text:tab/><text:span text:style-name="T3">D. This is possibly the scariest part of this verse for those of us with children. Her children will be struck dead because of an unrepentant heart, but this probably does not mean her physical children but the children who follow her or her followers if you will. Either way its a horrible end. </text:span></text:p>
      <text:p text:style-name="P6"><text:tab/><text:span text:style-name="T3">E. Again we are reminded at the end of verse 23 that Jesus can see our hearts our minds and knows our deeds. We are repaid for those deeds, nothing we do is done is secret. </text:span></text:p>
      <text:p text:style-name="P7">Vs. 24-25</text:p>
      <text:p text:style-name="P8"><text:tab/>A. For those of us who do not tolerate false teaching, who do not openly call for members to sin willingly, Jesus does not impose a burden upon us. </text:p>
      <text:p text:style-name="P8"><text:tab/>B. He just calls on us to hold on until He comes back. That means we teach the gospel, we proclaim Christ and Him crucified, and are not tolerant of false teachings in the church. </text:p>
      <text:p text:style-name="P9">Vs. 26-29</text:p>
      <text:p text:style-name="P10"><text:tab/>A. The ending three verses come from the Old Testament. Peculiarly Psalm 2, and Isaiah 14. Jesus is telling us that we will rule in the new Heaven and New Earth. We will be placed over nations and even take the place of the Morning Star (which is often refereed to as Satan). </text:p>
      <text:p text:style-name="P10"><text:tab/>B. <text:span text:style-name="T4">Give him the morning star does not mean that they will be the new Satan, but probably the role that Satan originally had. This is all about what happens at the end of everything. </text:span></text:p>
      <text:p text:style-name="P10"><text:tab/><text:span text:style-name="T4">C. Jesus is giving us His promise that if we are steadfast and hold on to the things of the Lord we will preserver and be with Him in eternity. </text:span></text:p>
      <text:p text:style-name="P11">Ending</text:p>
      <text:p text:style-name="P12"><text:tab/>We come to the end of chapter 2, We have 3 churches left. And then Revelation truly begins. We see that we are to never let false teaching take place in the church, and if someone tries we are to stop it as soon as it starts. Most of the time the person who is teaching false will leave, but if they do not and they refuse to repent we are to banish them from the church. It is the same way if you have sheep, you would not allow a wolf to sleep with them. We are to, again, persevere because the time is short and <text:soft-page-break/>growing shorter and shorter each day. Finally there is always hope in Christ, he wants us to repent and does not delight in sending people to hell.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9T17:41:33.848162044</meta:creation-date>
    <dc:title>default</dc:title>
    <meta:editing-duration>PT26M33S</meta:editing-duration>
    <meta:editing-cycles>3</meta:editing-cycles>
    <meta:generator>LibreOffice/26.2.1.1$Linux_X86_64 LibreOffice_project/620$Build-1</meta:generator>
    <dc:date>2026-05-30T12:33:02.102048358</dc:date>
    <meta:document-statistic meta:table-count="0" meta:image-count="0" meta:object-count="0" meta:page-count="4" meta:paragraph-count="30" meta:word-count="1080" meta:character-count="5540" meta:non-whitespace-character-count="4453"/>
    <meta:template xlink:type="simple" xlink:actuate="onRequest" xlink:title="default" xlink:href="../../../../Templates/default.ott" meta:date="2026-05-29T17:41:33.519218250"/>
  </office:meta>
</office:document-meta>
</file>