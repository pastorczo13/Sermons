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7e998" officeooo:paragraph-rsid="0007e998"/>
    </style:style>
    <style:style style:name="P2"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7e998" officeooo:paragraph-rsid="0007e998" style:font-weight-asian="bold" style:font-weight-complex="bold"/>
    </style:style>
    <style:style style:name="P3" style:family="paragraph" style:parent-style-name="Standard">
      <style:paragraph-properties fo:line-height="200%" fo:text-align="left" style:justify-single-word="false" fo:text-indent="0.5in" style:auto-text-indent="true"/>
      <style:text-properties style:text-underline-style="none" fo:font-weight="normal" officeooo:rsid="0007e998" officeooo:paragraph-rsid="0007e998" style:font-weight-asian="normal" style:font-weight-complex="normal"/>
    </style:style>
    <style:style style:name="P4"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90ea2" officeooo:paragraph-rsid="00090ea2" style:font-weight-asian="bold" style:font-weight-complex="bold"/>
    </style:style>
    <style:style style:name="P5" style:family="paragraph" style:parent-style-name="Standard">
      <style:paragraph-properties fo:line-height="200%" fo:text-align="left" style:justify-single-word="false" fo:text-indent="0.5in" style:auto-text-indent="true"/>
      <style:text-properties style:text-underline-style="none" fo:font-weight="normal" officeooo:rsid="00090ea2" officeooo:paragraph-rsid="00090ea2" style:font-weight-asian="normal" style:font-weight-complex="normal"/>
    </style:style>
    <style:style style:name="P6"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9cf22" officeooo:paragraph-rsid="0009cf22" style:font-weight-asian="bold" style:font-weight-complex="bold"/>
    </style:style>
    <style:style style:name="P7" style:family="paragraph" style:parent-style-name="Standard">
      <style:paragraph-properties fo:line-height="200%" fo:text-align="left" style:justify-single-word="false" fo:text-indent="0.5in" style:auto-text-indent="true"/>
      <style:text-properties style:text-underline-style="none" fo:font-weight="normal" officeooo:rsid="0009cf22" officeooo:paragraph-rsid="0009cf22" style:font-weight-asian="normal" style:font-weight-complex="normal"/>
    </style:style>
    <style:style style:name="P8"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ab0cb" officeooo:paragraph-rsid="000ab0cb" style:font-weight-asian="bold" style:font-weight-complex="bold"/>
    </style:style>
    <style:style style:name="P9" style:family="paragraph" style:parent-style-name="Standard">
      <style:paragraph-properties fo:line-height="200%" fo:text-align="left" style:justify-single-word="false" fo:text-indent="0.5in" style:auto-text-indent="true"/>
      <style:text-properties style:text-underline-style="none" fo:font-weight="normal" officeooo:rsid="000ab0cb" officeooo:paragraph-rsid="000ab0cb" style:font-weight-asian="normal" style:font-weight-complex="normal"/>
    </style:style>
    <style:style style:name="P10"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aca51" officeooo:paragraph-rsid="000aca51" style:font-weight-asian="bold" style:font-weight-complex="bold"/>
    </style:style>
    <style:style style:name="T1" style:family="text">
      <style:text-properties officeooo:rsid="000aca51"/>
    </style:style>
    <style:style style:name="T2" style:family="text">
      <style:text-properties officeooo:rsid="00090ea2"/>
    </style:style>
    <style:style style:name="T3" style:family="text">
      <style:text-properties officeooo:rsid="0009cf22"/>
    </style:style>
    <style:style style:name="T4" style:family="text">
      <style:text-properties officeooo:rsid="000ab0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elation 3:1-6 – <text:s/><text:span text:style-name="T1">Church of </text:span>Sardis</text:p>
      <text:p text:style-name="P2">Preface</text:p>
      <text:p text:style-name="P3"><text:tab/>The commendations and condemnations to the first four churches are done, now on to the final three churches in Asia Minor. As a reminder these were all real churches with real congregants in them, these letters were just not written to those members, but also to us in this day and age as well. Like many things with the Word of God there are things here with more and one meaning. Certainly you can make the parallel between the 7 church ages and these churches as well. We can see the history of Christianity in all of these churches, and it is no doubt if these are viewed as church history we are in the Laodicean age. Although these churches no longer stand, their influence had a lasting affect as we are all here today celebrating once again this Sunday our risen Lord. </text:p>
      <text:p text:style-name="P2">Vs. 1</text:p>
      <text:p text:style-name="P3"><text:tab/>A. The introduction here not unlike the rest of the introduction to the other churches begin with Jesus Christ saying who is in authority in these churches. It is Jesus who holds the seven spirits or seven-fold spirit more accurately, and the seven stars. </text:p>
      <text:p text:style-name="P3"><text:tab/>B. The seven stars again comes from the very last verse in chapter one, the seven stars are the seven churches. What is a stars main job? It is to give light to the world. Literally as stated before these churches were the center of the Christian universe at that time and all the light or ministries came out of these since the fall of Jerusalem in around AD. 60</text:p>
      <text:p text:style-name="P3"><text:tab/>C. <text:span text:style-name="T2">Sardis was a church that, unlike what we see in modern day churches, seemed alive. They had plenty of external activities, they had outreach, they had the appearance of being very dedicated to Jesus, but they were dead. </text:span></text:p>
      <text:p text:style-name="P3"><text:tab/><text:span text:style-name="T2">D. There are several churches in our area who are like this. They have outreach but ultimately they fall short in their preaching and teaching. They view Christianity as just one way to get to heaven and the bible is only metaphorical not the true Word of God as we believe. </text:span></text:p>
      <text:p text:style-name="P4"/>
      <text:p text:style-name="P4"><text:soft-page-break/>Vs 2.</text:p>
      <text:p text:style-name="P5"><text:tab/>A. A general call to all churches is to wake up. For the longest time in Christianity we have become complacent. Sardis was no different. Like, us, Sardis thought they had time. People often think they have more time than they have.</text:p>
      <text:p text:style-name="P5"><text:tab/>B. We are all called to not get lazy. We need to constantly and consistently chase the Lord. By this I mean that we cannot stop reading our bibles, and cannot stop praying. We must always look a this life as a race that is only over when we get to heaven.</text:p>
      <text:p text:style-name="P5"><text:tab/>C. 2 Timothy 4:7 “I have fought the good fight, I have finished the race, I have kept the faith.” Our job is to always push forward. If we are Christian, trust me on this one God will not let you sit still for very long.</text:p>
      <text:p text:style-name="P4">Vs. 3</text:p>
      <text:p text:style-name="P5"><text:tab/>A. Again we are told in verse three to keep hanging on. Although things may seem bleak, you may be in a spiritual valley, We are to always keep pushing. Jesus never leaves us and is always there to help us in our struggles.</text:p>
      <text:p text:style-name="P5"><text:tab/>B. <text:span text:style-name="T3">We are shown here to repent. There is a common theme among most of these churches. The only thing that saves us is repentance. Repentance is not being sorry for being caught, it is a complete turning from our sin. We cannot repent just once as since we are born sinners and will always sin as long as we are here, we must also constantly repent. </text:span></text:p>
      <text:p text:style-name="P5"><text:tab/><text:span text:style-name="T3">C. Jesus at the end of verse three is giving yet another warning. He will come like a thief. He will take away their influence. These churches and these letters are great for the modern church. Just because we may pay the bills it is ultimately Jesus who decides whether a church remains productive or not.</text:span></text:p>
      <text:p text:style-name="P6">Vs. 4</text:p>
      <text:p text:style-name="P7"><text:soft-page-break/><text:tab/>A. God will always have a remnant. We see this in this book of Revelation, the same as we can see it throughout the Word of God. No matter how bleak a nation looks, no matter how bleak Christianity may seem in the world. God still has his people here.</text:p>
      <text:p text:style-name="P7"><text:tab/>B. Our promise is if we run the race, keep the faith, do the things that we are called to do, do not forsake our first love we will all be dressed in white. Which means we will spend eternity with Jesus without sin and shame.</text:p>
      <text:p text:style-name="P7"><text:tab/>C. Not only that Jesus says we will be worthy of this. It will be a day when we get to heaven and Jesus says to us the same thing he said in Matthew 25:23 “...Well done, good and faithful servant! You have been faithful with a few things; I will put you in charge of many things…”</text:p>
      <text:p text:style-name="P6">Vs. 5-<text:span text:style-name="T4">6</text:span></text:p>
      <text:p text:style-name="P7"><text:tab/>A. Matthew 10:32 “So everyone who acknowledges me before men, I also will acknowledge before my Father who is in heaven,”. Jesus will acknowledge us before God and the angels. He will proclaim and show us to the Father. </text:p>
      <text:p text:style-name="P7"><text:tab/>B. <text:span text:style-name="T4">This is again our promise. Not only will the people of Sardis be dressed in white those who read this book and do the same will be there as well. It is a reminder of not only what was said the verse before but a constant reminder that Jesus is always with us. </text:span></text:p>
      <text:p text:style-name="P7"><text:tab/><text:span text:style-name="T4">C. He will never blot our name out of the book of life. These verse is one of these that cause controversy in Christianity. It is the difference in Salvation and the mode of it. The two main views are Arminian which states you can loose your salvation and Calvanism which states you cannot. Whatever you believe does not matter because the end result is the same. </text:span></text:p>
      <text:p text:style-name="P7"><text:tab/><text:span text:style-name="T4">D. Whoever has ears, let him hear. This is a prominent statement from Jesus. He says this several times. It made the readers and listeners remember Psalm 115:6 “They have ears, but cannot hear, noses, but cannot smell.” Jesus is saying here, if you have ears listen and understand. </text:span></text:p>
      <text:p text:style-name="P8">Closing</text:p>
      <text:p text:style-name="P9"><text:soft-page-break/><text:tab/>Today we went over just one church. A lot of things can be further pressed upon with this church that has nothing to do with what Jesus was teaching. Whether or not you believe you can loose your salvation or not does not matter in the grand scheme of things. The only thing that matters is are we trusting in Christ and continuing what He has taught us. We are to never give up and we are to always keep the faith. We are to do the things that we are told to do, and repent constantly for the sins we commit. If all those things are done then we will be standing with Jesus being presented to the Father as prized possessions of our Lord and Savior. ----let us begin our communion service</text:p>
      <text:p text:style-name="P10">Communion – Matthew 26:26-30</text:p>
      <text:p text:style-name="P10"/>
      <text:p text:style-name="P10">26 While they were eating, Jesus took bread, and when he had given thanks, he broke it and gave it to his disciples, saying, “Take and eat; this is my body.”</text:p>
      <text:p text:style-name="P10"/>
      <text:p text:style-name="P10">27 Then he took a cup, and when he had given thanks, he gave it to them, saying, “Drink from it, all of you. 28 This is my blood of the[b] covenant, which is poured out for many for the forgiveness of sins. 29 I tell you, I will not drink from this fruit of the vine from now on until that day when I drink it new with you in my Father’s kingdom.”</text:p>
      <text:p text:style-name="P10"/>
      <text:p text:style-name="P10">30 When they had sung a hymn, they went out to the Mount of Oliv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6T13:04:09.217190425</meta:creation-date>
    <dc:title>default</dc:title>
    <meta:editing-duration>PT3M20S</meta:editing-duration>
    <meta:editing-cycles>2</meta:editing-cycles>
    <meta:generator>LibreOffice/26.2.3.2$Linux_X86_64 LibreOffice_project/620$Build-2</meta:generator>
    <dc:date>2026-06-06T14:05:47.284108438</dc:date>
    <meta:document-statistic meta:table-count="0" meta:image-count="0" meta:object-count="0" meta:page-count="4" meta:paragraph-count="31" meta:word-count="1292" meta:character-count="6748" meta:non-whitespace-character-count="5457"/>
    <meta:template xlink:type="simple" xlink:actuate="onRequest" xlink:title="default" xlink:href="../../../../../../Templates/default.ott" meta:date="2026-06-06T13:04:08.674255184"/>
  </office:meta>
</office:document-meta>
</file>