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6f708" officeooo:paragraph-rsid="0006f708"/>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6f708" officeooo:paragraph-rsid="0006f708"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6f708" officeooo:paragraph-rsid="0006f708"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7df65" officeooo:paragraph-rsid="0007df65"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07df65" officeooo:paragraph-rsid="0007df65"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7df65" officeooo:paragraph-rsid="0007e3e7" style:font-weight-asian="bold" style:font-weight-complex="bold"/>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07e3e7" officeooo:paragraph-rsid="0007e3e7" style:font-weight-asian="normal" style:font-weight-complex="normal"/>
    </style:style>
    <style:style style:name="P8" style:family="paragraph" style:parent-style-name="Standard">
      <style:paragraph-properties fo:line-height="200%" fo:text-align="left" style:justify-single-word="false" fo:text-indent="0.5in" style:auto-text-indent="true"/>
      <style:text-properties style:text-underline-style="none" fo:font-weight="normal" officeooo:rsid="0007df65" officeooo:paragraph-rsid="0007e3e7" style:font-weight-asian="normal" style:font-weight-complex="normal"/>
    </style:style>
    <style:style style:name="P9"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7e3e7" officeooo:paragraph-rsid="0007e3e7" style:font-weight-asian="bold" style:font-weight-complex="bold"/>
    </style:style>
    <style:style style:name="P10"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920e8" officeooo:paragraph-rsid="000920e8" style:font-weight-asian="bold" style:font-weight-complex="bold"/>
    </style:style>
    <style:style style:name="P11" style:family="paragraph" style:parent-style-name="Standard">
      <style:paragraph-properties fo:line-height="200%" fo:text-align="left" style:justify-single-word="false" fo:text-indent="0.5in" style:auto-text-indent="true"/>
      <style:text-properties style:text-underline-style="none" fo:font-weight="normal" officeooo:rsid="000920e8" officeooo:paragraph-rsid="000920e8" style:font-weight-asian="normal" style:font-weight-complex="normal"/>
    </style:style>
    <style:style style:name="T1" style:family="text">
      <style:text-properties officeooo:rsid="0007df65"/>
    </style:style>
    <style:style style:name="T2" style:family="text">
      <style:text-properties officeooo:rsid="0007e3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6:1-6 – 3 Seals</text:p>
      <text:p text:style-name="P2">Preface</text:p>
      <text:p text:style-name="P3"><text:tab/>Before we begin with the opening of the seven seals, We must go over the rapture briefly. The rapture occurs when Jesus comes down from heaven and collects or raptures his church (us). <text:span text:style-name="T1">This will occur when the Father tells Jesus it is time. No one knows the date or the hour but we all must know that it will occur. Could it possibly occur when John could not find one worthy to open the scroll or seals in Chapter 5 verse 4? Maybe, possibly, but we all just know that it will occur. </text:span><text:span text:style-name="T2">We must also remember that these seals are a judgment of God, God is removing His chosen people from the earth and giving the rest of humanity what they truly want, a life without Him. </text:span><text:span text:style-name="T1">At any rate, let us begin with the seven seals. </text:span></text:p>
      <text:p text:style-name="P4">Vs. 1</text:p>
      <text:p text:style-name="P5"><text:tab/>A. After all of heaven and earth praise Jesus for being able to open the scroll and seals, Jesus begins with the opening of the first seal. </text:p>
      <text:p text:style-name="P5"><text:tab/>B. The stage has been set, now is time for the wrath of the Lamb on this earth. The opening of the seals starts an event that will only end in the destruction of the world. </text:p>
      <text:p text:style-name="P5"><text:tab/>C. One of the four living creatures sounds like thunder, this means that it is a booming voice, telling John to look to see what is going to happen.</text:p>
      <text:p text:style-name="P4">Vs. 2</text:p>
      <text:p text:style-name="P5"><text:tab/>A. Like, when Jesus returns on a white horse, this rider has a white horse the difference is that Jesus comes with a sword this rider has a bow. This is more than likely what Daniel was speaking of in Daniel nine, it is the start of the 7 years of tribulation.</text:p>
      <text:p text:style-name="P5"><text:tab/>B. This leader will be charismatic, He will conquer the whole earth with war and speech.</text:p>
      <text:p text:style-name="P5"><text:tab/>C. He will be crowned king of the world. This person is also known as the anti-Christ.</text:p>
      <text:p text:style-name="P6">Vs. 3-<text:span text:style-name="T2">4</text:span></text:p>
      <text:p text:style-name="P7"><text:soft-page-break/><text:tab/>A. This rider does not make war on the world. He just needs to take peace away. With the absence of Godly peace, murder and strife will occur naturally to men.</text:p>
      <text:p text:style-name="P5"><text:tab/><text:span text:style-name="T2">B. He was given a great sword, this illustrates the complete and total destruction that this rider will bring. He will be sent for the sole purpose of making people murder each other.</text:span></text:p>
      <text:p text:style-name="P8"><text:tab/><text:span text:style-name="T2">C. Obviously we can see from all of these seals that these riders are compounding upon each other. The white “savior” makes way for immorality and warfare.</text:span></text:p>
      <text:p text:style-name="P9">Vs. 5-6</text:p>
      <text:p text:style-name="P7"><text:tab/>A. So the compounding part of these seals and riders continue. The red horse makes way for the black horse. Its rider is carrying scales, or something used to weigh stuff.</text:p>
      <text:p text:style-name="P7"><text:tab/>B. We see what happens when the world is filled with war and murder and strife, the end result is famine. Major worldly famine. </text:p>
      <text:p text:style-name="P7"><text:tab/>C. <text:s/>Wheat for a penny or a days wages, barley for a days wages. It is saying major inflation will occur, a loaf of bread will cost 2 to 3 days wages. The famine will be terrible</text:p>
      <text:p text:style-name="P7"><text:tab/>D. Do not touch the oil and wine! This means that those who are rich will have the money and means to still eat. It is the common person who will be suffering during this time. So the vast majority of people will go hungry but the rich will be alright. </text:p>
      <text:p text:style-name="P10">Closing</text:p>
      <text:p text:style-name="P11"><text:tab/>Today we went over the first three seals. There is a lot of information that could be unpacked, but that involves a lot of speculation and is open to arguments and sometimes bad interpretations. It is our job as a church to understand what is going to happen and not focus on the minute details of everything in this book. We as a church need to just pray for those in our lives who have not accepted Jesus as their savior so they never have to worry about the events that will occur one day. For those people who do not accept Christ as their savior literally hell on earth will occur. </text:p>
      <text:p text:style-name="P10">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7T18:37:03.158148597</meta:creation-date>
    <dc:title>default</dc:title>
    <meta:editing-duration>PT3M</meta:editing-duration>
    <meta:editing-cycles>2</meta:editing-cycles>
    <meta:generator>LibreOffice/26.2.1.1$Linux_X86_64 LibreOffice_project/620$Build-1</meta:generator>
    <dc:date>2026-07-17T19:12:52.479211965</dc:date>
    <meta:document-statistic meta:table-count="0" meta:image-count="0" meta:object-count="0" meta:page-count="2" meta:paragraph-count="23" meta:word-count="677" meta:character-count="3510" meta:non-whitespace-character-count="2833"/>
    <meta:template xlink:type="simple" xlink:actuate="onRequest" xlink:title="default" xlink:href="../../../../../../Templates/default.ott" meta:date="2026-07-17T18:37:02.833742251"/>
  </office:meta>
</office:document-meta>
</file>