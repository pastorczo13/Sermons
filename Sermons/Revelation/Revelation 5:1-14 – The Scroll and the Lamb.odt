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8cf94" officeooo:paragraph-rsid="0008cf94"/>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8cf94" officeooo:paragraph-rsid="0008cf94"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8cf94" officeooo:paragraph-rsid="0008cf94"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a0e63" officeooo:paragraph-rsid="000a0e63"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a0e63" officeooo:paragraph-rsid="000a0e63"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a4d11" officeooo:paragraph-rsid="000a4d11"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a4d11" officeooo:paragraph-rsid="000a4d11" style:font-weight-asian="normal" style:font-weight-complex="normal"/>
    </style:style>
    <style:style style:name="P8" style:family="paragraph" style:parent-style-name="Standard">
      <style:paragraph-properties fo:line-height="200%" fo:text-align="left" style:justify-single-word="false" fo:text-indent="0.5in" style:auto-text-indent="true"/>
      <style:text-properties style:text-underline-style="none" fo:font-weight="bold" officeooo:rsid="000a4d11" officeooo:paragraph-rsid="000a4d11" style:font-weight-asian="bold" style:font-weight-complex="bold"/>
    </style:style>
    <style:style style:name="P9"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b755b" officeooo:paragraph-rsid="000b755b" style:font-weight-asian="bold" style:font-weight-complex="bold"/>
    </style:style>
    <style:style style:name="P10" style:family="paragraph" style:parent-style-name="Standard">
      <style:paragraph-properties fo:line-height="200%" fo:text-align="left" style:justify-single-word="false" fo:text-indent="0.5in" style:auto-text-indent="true"/>
      <style:text-properties style:text-underline-style="none" fo:font-weight="normal" officeooo:rsid="000b755b" officeooo:paragraph-rsid="000b755b" style:font-weight-asian="normal" style:font-weight-complex="normal"/>
    </style:style>
    <style:style style:name="P11"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d3246" officeooo:paragraph-rsid="000d3246" style:font-weight-asian="bold" style:font-weight-complex="bold"/>
    </style:style>
    <style:style style:name="P12" style:family="paragraph" style:parent-style-name="Standard">
      <style:paragraph-properties fo:line-height="200%" fo:text-align="left" style:justify-single-word="false" fo:text-indent="0.5in" style:auto-text-indent="true"/>
      <style:text-properties style:text-underline-style="none" fo:font-weight="normal" officeooo:rsid="000d3246" officeooo:paragraph-rsid="000d3246" style:font-weight-asian="normal" style:font-weight-complex="normal"/>
    </style:style>
    <style:style style:name="P13"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f1935" officeooo:paragraph-rsid="000f1935" style:font-weight-asian="bold" style:font-weight-complex="bold"/>
    </style:style>
    <style:style style:name="P14" style:family="paragraph" style:parent-style-name="Standard">
      <style:paragraph-properties fo:line-height="200%" fo:text-align="left" style:justify-single-word="false" fo:text-indent="0.5in" style:auto-text-indent="true"/>
      <style:text-properties style:text-underline-style="none" fo:font-weight="normal" officeooo:rsid="000f1935" officeooo:paragraph-rsid="000f1935" style:font-weight-asian="normal" style:font-weight-complex="normal"/>
    </style:style>
    <style:style style:name="T1" style:family="text">
      <style:text-properties officeooo:rsid="000a0e63"/>
    </style:style>
    <style:style style:name="T2" style:family="text">
      <style:text-properties officeooo:rsid="000a4d11"/>
    </style:style>
    <style:style style:name="T3" style:family="text">
      <style:text-properties officeooo:rsid="000b755b"/>
    </style:style>
    <style:style style:name="T4" style:family="text">
      <style:text-properties officeooo:rsid="000d3246"/>
    </style:style>
    <style:style style:name="T5" style:family="text">
      <style:text-properties officeooo:rsid="000f19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5:1-14 – The Scroll and the Lamb</text:p>
      <text:p text:style-name="P2">Preface</text:p>
      <text:p text:style-name="P3"><text:tab/>Today we continue in the Throne Room. Last week the scene was set, the Twenty Four Elders with twenty four thrones, the four living creatures or probably more accurately angels, and God and His Throne. The twenty four elders and living creatures main job is just to glorify the one who sits on the throne. We saw a beautiful and honestly frightening scene laid out before us by John. Now this week we look at the opening of the scroll and who is worthy to open it. Again it must be stated that all of Revelation up to this point happened at one time. Again there are multiple theories that all of Revelation happened at one time, but more than likely there were at least 7 of these visions. Let us begin</text:p>
      <text:p text:style-name="P2">Vs. 1-2</text:p>
      <text:p text:style-name="P3"><text:tab/>A. The right hand is considered the hand of power. If you see something in the Word of God that refers to a side the right hand is always the side of power. That is why Jesus is sitting at the Right Hand of the Father. </text:p>
      <text:p text:style-name="P3"><text:tab/>B. <text:span text:style-name="T1">Book or scroll? The answer is yes. We would refer to it in our common vernacular a scroll. It was written on front and back, and sealed with 7 seals. This was not a small scroll but a very very big one. </text:span></text:p>
      <text:p text:style-name="P3"><text:tab/><text:span text:style-name="T1">C. A strong and mighty angel. This had to be stated because, if this angel is not worthy or cannot open it who can?</text:span></text:p>
      <text:p text:style-name="P4">Vs. 3-4</text:p>
      <text:p text:style-name="P5"><text:tab/>A. The only one who could open the scroll was no where to be seen as of yet. No one is was worthy to open the scroll. It took perfection.</text:p>
      <text:p text:style-name="P5"><text:tab/>B. John wept <text:span text:style-name="T2">for two reason, first was only perfection and power could open this seal and John had not seen Jesus yet, and second Hebrew and Romans both used seals for their deeds and will, each </text:span><text:soft-page-break/><text:span text:style-name="T2">with several seals and witness for each seal. </text:span><text:s/>This was just not any scroll, it was the deed to the earth and humanity.</text:p>
      <text:p text:style-name="P5"><text:tab/>C. <text:span text:style-name="T2">Without someone who could open the seals and read the scroll, no one was able to claim dominion over humanity thus no one could enter heaven.</text:span></text:p>
      <text:p text:style-name="P6">Vs. 5</text:p>
      <text:p text:style-name="P7"><text:tab/>A. The Lion of the Tribe of Judah, The Root of David the Lamb that was slain, its Jesus!!!!! He has arrived and is on a mission.</text:p>
      <text:p text:style-name="P7"><text:tab/>B. So John is not just a passive witness looking from the outside in, He is actually there, one of the elders engages John and tells him not to weep.</text:p>
      <text:p text:style-name="P8">Vs. 6</text:p>
      <text:p text:style-name="P7"><text:tab/><text:span text:style-name="T3">A. As we discussed last week, John if he was trying to describe something he did not understand he would write it is like a, this was not it, John saw a sacrificial lamb. A lamb that was already slain. It had the scars, the marks of sacrifice. </text:span></text:p>
      <text:p text:style-name="P7"><text:tab/><text:span text:style-name="T3">B. Horns in scripture generally mean power. <text:s/>This lamb had seven horns which shows God’s omnipotence (all powerful), and seven eye which shows God’s omniscience (all knowing). So 7 horns and 7 eyes the perfection and power that is needed for the scrolls. </text:span></text:p>
      <text:p text:style-name="P9">Vs. 7-8</text:p>
      <text:p text:style-name="P10"><text:tab/>A. John sees Jesus take the scroll from the right hand of God. And sat on the throne. This is the throne Jesus told us about in Luke 22:69 “But from now on the Son of Man shall be seated at the right hand of the power of God.” and also it was mentioned in Psalm 110:1”A Psalm of David. The Lord says to my Lord: “Sit at my right hand, until I make your enemies your footstool.”</text:p>
      <text:p text:style-name="P10"><text:tab/>B. <text:span text:style-name="T4">All bowed before the lamb. They are no longer just worshiping the Father now but also the second part of the trinity, Jesus.</text:span></text:p>
      <text:p text:style-name="P10"><text:tab/><text:span text:style-name="T4">C. Each has a harp to play and bowls full of incense which are prayers. Our prayers are being heard and recorded. </text:span></text:p>
      <text:p text:style-name="P11"><text:soft-page-break/>Vs. 9-10</text:p>
      <text:p text:style-name="P12"><text:tab/>A. This new song is a joyous one, it is showing that Jesus indeed was the owner to the title and deed to the earth. It also shows that those of us who are Christians shall one day rule on earth.</text:p>
      <text:p text:style-name="P12"><text:tab/>B. We will reign with Christ during the thousand year reign. We will serve and kings and priests to God. What a joyous time.</text:p>
      <text:p text:style-name="P11">Vs. 11</text:p>
      <text:p text:style-name="P12"><text:tab/>A. I am sure this is a place where people will try to be dogmatic, we are not. There were innumerable angels. </text:p>
      <text:p text:style-name="P12"><text:tab/>B. They encircled the throne and the living creatures and the elders. They were there to give glory to Jesus. The exact number does not matter. It was a massive member of angels. </text:p>
      <text:p text:style-name="P11">Vs. 12</text:p>
      <text:p text:style-name="P12"><text:tab/>A. All have a part to play in heaven. And that part is worship. The angels here are doing just that. </text:p>
      <text:p text:style-name="P12"><text:tab/>B. These angels like the four living creatures and the 24 elders are telling Jesus that He is worthy because He was slain. He is to receive wealth, wisdom and strength. He is to receive honor, glory and praise.</text:p>
      <text:p text:style-name="P11">Vs. 13-14</text:p>
      <text:p text:style-name="P12"><text:tab/>A. An now everyone joins in at the same time, not just in heaven mind you. Everything. </text:p>
      <text:p text:style-name="P12"><text:tab/><text:span text:style-name="T5">B. Philippians 2:10-11 “10 so that at the name of Jesus every knee should bow, in heaven and on earth and under the earth, 11 and every tongue confess that Jesus Christ is Lord, to the glory of God the Father.” Also in Romans 14:11 “For it is written: “As I live, says the Lord, Every knee shall bow to Me, And every tongue shall confess to God.”</text:span></text:p>
      <text:p text:style-name="P12"><text:tab/><text:span text:style-name="T5">C. Everything that has breath will surely praise the Lord in the end. </text:span></text:p>
      <text:p text:style-name="P12"><text:tab/><text:span text:style-name="T5">D. Amen! All of Heaven Agrees</text:span></text:p>
      <text:p text:style-name="P13">Closing</text:p>
      <text:p text:style-name="P14"><text:soft-page-break/>This week we continued in the Throne room of God. We saw this week along with the 4 living creatures and 24 elders, we saw a multitude of angels, we heard from everything that is on, above and below the earth and in the sea give praise to Jesus. We saw that John was not just looking at this from afar, he was there and was being interacted and engaged with. We ultimate see in these last two chapters the Majesty, Honor and Power of God the Father, God the Son and God the Holy Spirit. We see how everything will praise God eventually. We also see Jesus is the only one who is worthy. </text:p>
      <text:p text:style-name="P13">Pray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0T12:24:10.500320326</meta:creation-date>
    <dc:title>default</dc:title>
    <meta:editing-duration>PT6M17S</meta:editing-duration>
    <meta:editing-cycles>2</meta:editing-cycles>
    <meta:generator>LibreOffice/26.2.1.1$Linux_X86_64 LibreOffice_project/620$Build-1</meta:generator>
    <dc:date>2026-07-10T13:26:22.051842717</dc:date>
    <meta:document-statistic meta:table-count="0" meta:image-count="0" meta:object-count="0" meta:page-count="4" meta:paragraph-count="38" meta:word-count="1061" meta:character-count="5417" meta:non-whitespace-character-count="4355"/>
    <meta:template xlink:type="simple" xlink:actuate="onRequest" xlink:title="default" xlink:href="../../../../../../Templates/default.ott" meta:date="2026-07-10T12:24:10.162087487"/>
  </office:meta>
</office:document-meta>
</file>