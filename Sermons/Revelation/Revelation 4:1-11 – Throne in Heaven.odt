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6f398" officeooo:paragraph-rsid="0006f398"/>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6f398" officeooo:paragraph-rsid="0006f398"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6f398" officeooo:paragraph-rsid="0006f398"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78f02" officeooo:paragraph-rsid="00078f02"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78f02" officeooo:paragraph-rsid="00078f02"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90c8c" officeooo:paragraph-rsid="00090c8c"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90c8c" officeooo:paragraph-rsid="00090c8c" style:font-weight-asian="normal" style:font-weight-complex="normal"/>
    </style:style>
    <style:style style:name="P8"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973a5" officeooo:paragraph-rsid="000973a5" style:font-weight-asian="bold" style:font-weight-complex="bold"/>
    </style:style>
    <style:style style:name="P9" style:family="paragraph" style:parent-style-name="Standard">
      <style:paragraph-properties fo:line-height="200%" fo:text-align="left" style:justify-single-word="false" fo:text-indent="0.5in" style:auto-text-indent="true"/>
      <style:text-properties style:text-underline-style="none" fo:font-weight="normal" officeooo:rsid="000973a5" officeooo:paragraph-rsid="000973a5" style:font-weight-asian="normal" style:font-weight-complex="normal"/>
    </style:style>
    <style:style style:name="P10" style:family="paragraph" style:parent-style-name="Standard">
      <style:paragraph-properties fo:line-height="200%" fo:text-align="left" style:justify-single-word="false" fo:text-indent="0.5in" style:auto-text-indent="true"/>
      <style:text-properties style:text-underline-style="none" fo:font-weight="normal" officeooo:rsid="0009ef09" officeooo:paragraph-rsid="0009ef09" style:font-weight-asian="normal" style:font-weight-complex="normal"/>
    </style:style>
    <style:style style:name="P11"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9ef09" officeooo:paragraph-rsid="0009ef09" style:font-weight-asian="bold" style:font-weight-complex="bold"/>
    </style:style>
    <style:style style:name="T1" style:family="text">
      <style:text-properties style:text-position="super 58%"/>
    </style:style>
    <style:style style:name="T2" style:family="text">
      <style:text-properties officeooo:rsid="00078f02"/>
    </style:style>
    <style:style style:name="T3" style:family="text">
      <style:text-properties officeooo:rsid="00090c8c"/>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4:1-11 – Throne in Heaven</text:p>
      <text:p text:style-name="P2">Preface</text:p>
      <text:p text:style-name="P3"><text:tab/>Today we begin Revelation chapter 4, This is the part of Revelation that most people think is the start of what they think of when they think of Revelation. The letters the churches are written, the author and finisher of our Faith has been shown in all His Heavenly glory and majesty, and we are now being transported with John to the Throne of God. Most of what Revelation is is speculation, although it will all come true the minute details are up to speculation of the reader, and remember we have to view this from a 1<text:span text:style-name="T1">st</text:span> century Christian. There were no cars, no planes, no electricity, no guns, no smog. Those things did not come for another 1700 – 2000 years later. So John is trying to describe current or even future things from us with what he knew, animals. Let us begin</text:p>
      <text:p text:style-name="P2">Vs. 1</text:p>
      <text:p text:style-name="P3"><text:tab/>A. After this, means after the letters were written. Although we have had several sermons up to this point this all happened at the same time for John</text:p>
      <text:p text:style-name="P3"><text:tab/>B. Speaking like a trumpet means loud, and remember trumpets in the bible and ancient times were used to announce things and signify events</text:p>
      <text:p text:style-name="P3"><text:tab/>C. What takes place after this, means after the letters, it is the beginning of the Revelation of Jesus Christian</text:p>
      <text:p text:style-name="P2">Vs. 2-3</text:p>
      <text:p text:style-name="P3"><text:tab/>A. John could not physically visit heaven as his physical body could not survive the holiness of heaven. Remember no man can look upon the face of God and live. (Exodus 33:20)</text:p>
      <text:p text:style-name="P3"><text:tab/>B. John sees a throne in heaven, this is the throne of God. The throne is obviously not as important as the One who sits upon the throne</text:p>
      <text:p text:style-name="P3"><text:tab/>C. <text:span text:style-name="T2">Jasper and Sardine (ruby) representing purity and judgment. Emerald rainbow symbolizes grace and mercy. </text:span></text:p>
      <text:p text:style-name="P3"><text:soft-page-break/><text:tab/><text:span text:style-name="T2">D. We are not getting a physical description of God but we are getting his attributes shining. The physical description is not important but what God symbolizes to each of His children. He is pure and is judgment which is important for the coming chapters and is merciful and full of Grace. </text:span></text:p>
      <text:p text:style-name="P3"><text:tab/><text:span text:style-name="T2">E. Rainbows are not like most drawings they are actual circles and that shows completeness. </text:span></text:p>
      <text:p text:style-name="P4">Vs. 4</text:p>
      <text:p text:style-name="P5"><text:tab/>A. 24 elders, no one really knows who these elders are. It is assumed at least 12 of them are the 12 disciples. The other 12 might possibly be the 12 sons of Jacob. It is not important, the importance is what they are doing.</text:p>
      <text:p text:style-name="P5"><text:tab/>B. They all how crowns upon their heads and were dressed in white. <text:span text:style-name="T3">And they sat upon 24 thrones themselves. </text:span></text:p>
      <text:p text:style-name="P4">Vs 5-6</text:p>
      <text:p text:style-name="P5"><text:tab/>A. <text:span text:style-name="T3">A majestic scene is unfolding, flashes of lightning, rumblings of thunder. It is showing an inspiring, kind of frightening and awe inspiring show. </text:span></text:p>
      <text:p text:style-name="P5"><text:tab/><text:span text:style-name="T3">B. 7 lamps are shown here as the 7 spirits of God. Or seven-fold spirit of God. </text:span></text:p>
      <text:p text:style-name="P5"><text:tab/><text:span text:style-name="T3">C. The throne room is being described here as clear, it was clear like crystal is clear. Nothing is hidden in heaven. Nothing needs to hide in heaven.</text:span></text:p>
      <text:p text:style-name="P5"><text:tab/><text:span text:style-name="T3">D. 4 living creatures, they had eyes all over, again nothing is hidden and everything is seen, these are literal beings. </text:span></text:p>
      <text:p text:style-name="P6">Vs. 7-8</text:p>
      <text:p text:style-name="P7"><text:tab/>A. This is where John is trying to describe things from a first century point of view. Whenever the bible said it is like …. it means it is not that but that is the closest that it can be described as.</text:p>
      <text:p text:style-name="P7"><text:tab/>B. These living creatures, most assume are angels of some sort are like a lion, an calf or ox, had the face of a man, and was like a flying eagle. You can search for images of these things but I am sure none of them compare to the actual “creatures”</text:p>
      <text:p text:style-name="P7"><text:soft-page-break/><text:tab/>C. They each had six wings and there were even eyes under its wings. These creatures have one job and that is to say “Holy, Holy, Holy, is the Lord God Almighty, who was, and is, and is to come.” (Isaiah 6:3)</text:p>
      <text:p text:style-name="P8">Vs. 9-10</text:p>
      <text:p text:style-name="P9"><text:tab/>A. The scene that unfolds in front of John shows that all things give glory to God. All creatures, all animals, all people, everything gives glory to God. <text:span text:style-name="T4">(Luke 19:40 - And he answered and said unto them, I tell you that, if these should hold their peace, the stones would immediately cry out.)</text:span></text:p>
      <text:p text:style-name="P9"><text:tab/>B. The 24 at this same time will fall down, or prostrate themselves. And cast their crowns before God’s throne to God. This is an important detail. As everything that comes into contact with something holy will fall face down not fall backwards. </text:p>
      <text:p text:style-name="P9"><text:tab/>C. The living creatures main job is to glorify God. That is their job.</text:p>
      <text:p text:style-name="P8">Vs. 11</text:p>
      <text:p text:style-name="P9"><text:tab/>A. After the creatures give glory to God, then the elders take their turn </text:p>
      <text:p text:style-name="P9"><text:tab/>B. We can all pray this to God, we can all say this to God because all of it is true.</text:p>
      <text:p text:style-name="P9"><text:tab/>C. All things were created by and for God, all things give honor and Glory to God, and God alone. </text:p>
      <text:p text:style-name="P8">Closing</text:p>
      <text:p text:style-name="P10">Today we saw the start of what is thought of when discussing Revelation. We see four creatures who are in all reality to any of us who would see them would be scary. John is describing the setting of the throne room of God. We see 24 elders and the 4 living creatures we see beautiful imagery being described as beautiful jewels and a rainbow and floor as clear as crystal. It is a beautiful place that all of us will one day be. </text:p>
      <text:p text:style-name="P11">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1T12:21:54.829913985</meta:creation-date>
    <dc:title>default</dc:title>
    <meta:editing-duration>PT8M46S</meta:editing-duration>
    <meta:editing-cycles>2</meta:editing-cycles>
    <meta:generator>LibreOffice/26.2.1.1$Linux_X86_64 LibreOffice_project/620$Build-1</meta:generator>
    <dc:date>2026-07-01T13:15:44.862474922</dc:date>
    <meta:document-statistic meta:table-count="0" meta:image-count="0" meta:object-count="0" meta:page-count="3" meta:paragraph-count="36" meta:word-count="920" meta:character-count="4896" meta:non-whitespace-character-count="3975"/>
    <meta:template xlink:type="simple" xlink:actuate="onRequest" xlink:title="default" xlink:href="../../../../../../Templates/default.ott" meta:date="2026-07-01T12:21:54.496398324"/>
  </office:meta>
</office:document-meta>
</file>