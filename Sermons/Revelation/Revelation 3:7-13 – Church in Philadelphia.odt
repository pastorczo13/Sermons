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line-height="200%" fo:text-align="center" style:justify-single-word="false" fo:text-indent="0in" style:auto-text-indent="true"/>
      <style:text-properties officeooo:rsid="001e42b4" officeooo:paragraph-rsid="001e42b4"/>
    </style:style>
    <style:style style:name="P2"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1e42b4" officeooo:paragraph-rsid="001e42b4" style:font-weight-asian="bold" style:font-weight-complex="bold"/>
    </style:style>
    <style:style style:name="P3" style:family="paragraph" style:parent-style-name="Standard">
      <style:paragraph-properties fo:margin-left="0in" fo:line-height="200%" fo:text-align="left" style:justify-single-word="false" fo:text-indent="0in" style:auto-text-indent="true"/>
      <style:text-properties style:text-underline-style="none" fo:font-weight="normal" officeooo:rsid="001e42b4" officeooo:paragraph-rsid="001e42b4" style:font-weight-asian="normal" style:font-weight-complex="normal"/>
    </style:style>
    <style:style style:name="P4"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1f30e1" officeooo:paragraph-rsid="001f30e1" style:font-weight-asian="bold" style:font-weight-complex="bold"/>
    </style:style>
    <style:style style:name="P5" style:family="paragraph" style:parent-style-name="Standard">
      <style:paragraph-properties fo:margin-left="0in" fo:line-height="200%" fo:text-align="left" style:justify-single-word="false" fo:text-indent="0in" style:auto-text-indent="true"/>
      <style:text-properties style:text-underline-style="none" fo:font-weight="normal" officeooo:rsid="001f30e1" officeooo:paragraph-rsid="001f30e1" style:font-weight-asian="normal" style:font-weight-complex="normal"/>
    </style:style>
    <style:style style:name="P6" style:family="paragraph" style:parent-style-name="Standard">
      <style:paragraph-properties fo:margin-left="0in" fo:line-height="200%" fo:text-align="left" style:justify-single-word="false" fo:text-indent="0in" style:auto-text-indent="true"/>
      <style:text-properties style:text-underline-style="none" fo:font-weight="normal" officeooo:rsid="00200a7e" officeooo:paragraph-rsid="00200a7e" style:font-weight-asian="normal" style:font-weight-complex="normal"/>
    </style:style>
    <style:style style:name="P7"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200a7e" officeooo:paragraph-rsid="00200a7e" style:font-weight-asian="bold" style:font-weight-complex="bold"/>
    </style:style>
    <style:style style:name="P8"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20ffe7" officeooo:paragraph-rsid="0020ffe7" style:font-weight-asian="bold" style:font-weight-complex="bold"/>
    </style:style>
    <style:style style:name="P9" style:family="paragraph" style:parent-style-name="Standard">
      <style:paragraph-properties fo:margin-left="0in" fo:line-height="200%" fo:text-align="left" style:justify-single-word="false" fo:text-indent="0in" style:auto-text-indent="true"/>
      <style:text-properties style:text-underline-style="none" fo:font-weight="normal" officeooo:rsid="0020ffe7" officeooo:paragraph-rsid="0020ffe7" style:font-weight-asian="normal" style:font-weight-complex="normal"/>
    </style:style>
    <style:style style:name="P10"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225025" officeooo:paragraph-rsid="00225025" style:font-weight-asian="bold" style:font-weight-complex="bold"/>
    </style:style>
    <style:style style:name="P11" style:family="paragraph" style:parent-style-name="Standard">
      <style:paragraph-properties fo:margin-left="0in" fo:line-height="200%" fo:text-align="left" style:justify-single-word="false" fo:text-indent="0in" style:auto-text-indent="true"/>
      <style:text-properties style:text-underline-style="none" fo:font-weight="normal" officeooo:rsid="0023dc66" officeooo:paragraph-rsid="00225025" style:font-weight-asian="normal" style:font-weight-complex="normal"/>
    </style:style>
    <style:style style:name="P12" style:family="paragraph" style:parent-style-name="Standard">
      <style:paragraph-properties fo:margin-left="0in" fo:line-height="200%" fo:text-align="left" style:justify-single-word="false" fo:text-indent="0in" style:auto-text-indent="true"/>
      <style:text-properties style:text-underline-style="none" fo:font-weight="normal" officeooo:rsid="0023dc66" officeooo:paragraph-rsid="0023dc66" style:font-weight-asian="normal" style:font-weight-complex="normal"/>
    </style:style>
    <style:style style:name="P13"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23dc66" officeooo:paragraph-rsid="0023dc66" style:font-weight-asian="bold" style:font-weight-complex="bold"/>
    </style:style>
    <style:style style:name="P14" style:family="paragraph" style:parent-style-name="Standard">
      <style:paragraph-properties fo:margin-left="0in" fo:line-height="200%" fo:text-align="left" style:justify-single-word="false" fo:text-indent="0in" style:auto-text-indent="true"/>
      <style:text-properties style:text-underline-style="none" fo:font-weight="bold" officeooo:rsid="0023dc66" officeooo:paragraph-rsid="0023dc66" style:font-weight-asian="bold" style:font-weight-complex="bold"/>
    </style:style>
    <style:style style:name="T1" style:family="text">
      <style:text-properties officeooo:rsid="0023dc66"/>
    </style:style>
    <style:style style:name="T2" style:family="text">
      <style:text-properties officeooo:rsid="001f30e1"/>
    </style:style>
    <style:style style:name="T3" style:family="text">
      <style:text-properties fo:font-style="italic" style:font-style-asian="italic" style:font-style-complex="italic"/>
    </style:style>
    <style:style style:name="T4" style:family="text">
      <style:text-properties officeooo:rsid="00204fe5"/>
    </style:style>
    <style:style style:name="T5" style:family="text">
      <style:text-properties officeooo:rsid="0020ffe7"/>
    </style:style>
    <style:style style:name="T6" style:family="text">
      <style:text-properties officeooo:rsid="00225025"/>
    </style:style>
    <style:style style:name="T7" style:family="text">
      <style:text-properties fo:font-style="italic" officeooo:rsid="00225025" style:font-style-asian="italic" style:font-style-complex="italic"/>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3dc66" style:font-weight-asian="normal" style:font-weight-complex="normal"/>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3:7-13 – <text:span text:style-name="T1">Church in Philadelphia</text:span></text:p>
      <text:p text:style-name="P2">Preface</text:p>
      <text:p text:style-name="P3"><text:span text:style-name="T2">Last week we took a look at Sardis, this week we continue with the Church in Philadelphia. Philadelphia literally means brotherly love. That is where our city of Philadelphia gets its name. But unlike our city of Philadelphia, this city was influential. This city was a prized possession for the early church, and God blessed that church tremendously. Last week we talked about waking up and remembering our first love and finishing strong. This life is short and some of our walks with Christ have been shorter, but none the less, all of us have to keep the faith, and always be prepared to stand for Christ. Let us begin with the church in Philadelphia</text:span></text:p>
      <text:p text:style-name="P4">Vs. 7</text:p>
      <text:p text:style-name="P5"><text:tab/>A. We begin with literally the same way that all of these introductions to the churches begin, with Jesus stating who He is. He is the one who holds the Key of David, which means absolute authority to grant or deny access to the God’s kingdom.</text:p>
      <text:p text:style-name="P5"><text:tab/>B. Jesus has earned this right. He is the only one who can shut or open the door. No man can open or shut it only Jesus.</text:p>
      <text:p text:style-name="P6"><text:tab/>C. Jesus is holy and is true. We should know that the only holy and true things that come from us come from the Holy Spirit. It is this same Spirit that Jesus spoke about when He said He would send us a comforter. It is only because of Jesus that we can enter into the kingdom of Heaven. He is making definitive statements in the introduction to all these churches.</text:p>
      <text:p text:style-name="P7">Vs. 8</text:p>
      <text:p text:style-name="P6"><text:tab/>A. The first key to what this church is going through. Comes here. You have little strength. This does not mean that they are not doing the right things, it means that they are being persecuted from all sides, and are getting weaker because of all the fighting.</text:p>
      <text:p text:style-name="P6"><text:tab/>B. Jesus gives them hope by saying He has put an open door that no one can shut for them. They have kept His word and have not denied His name.</text:p>
      <text:p text:style-name="P6"><text:soft-page-break/><text:tab/>C. This again harkens back to what Jesus said in Matthew 10:32-33 “Whosoever therefore shall confess me before men, him will I confess also before my Father which is in heaven. <text:span text:style-name="T3">But whosoever shall deny me before men, him will I also deny before my Father which is in heaven.</text:span>”</text:p>
      <text:p text:style-name="P6"><text:tab/>D. This church has not denied Jesus so He placed an open door for them to come in and be with Him for eternity. </text:p>
      <text:p text:style-name="P7">Vs. 9</text:p>
      <text:p text:style-name="P6"><text:tab/>A. <text:span text:style-name="T4">This is one of several times that we have seen the phrase Synagogue of Satan. It refers to different peoples each time, but ruled by the same spirit. If we look at this as being church history, we can identify the Papacy in this, but in the actual church, like many other churches at that time it was primarily Jews who were trying to claim false things about Jesus.</text:span></text:p>
      <text:p text:style-name="P6"><text:span text:style-name="T4"><text:tab/>B. It is interesting to note that Jesus uses a phrase that He will cause them to worship before thy feet. </text:span><text:span text:style-name="T5">This is a great example of showing who holds the real power in the world. They are not worshiping the feet of the church members per say, but the power that Christ has given them. Because He loved them.</text:span></text:p>
      <text:p text:style-name="P8">Vs. 10</text:p>
      <text:p text:style-name="P9"><text:tab/>A. This verse has a double meaning. Keeping them from the hour of temptation or trail means that historically under the Roman persecution of Christians under the Emperor Trajan was especially brutal for Christians in the first century, but also for us in today it means that He will keep us from the tribulation that will come upon the earth.</text:p>
      <text:p text:style-name="P9"><text:tab/>B. God has never poured out His wrath upon His children, He saved Noah, He saved the Israelites in Egypt, He protected Paul during His missionary journeys. He will not pour out His wrath on us as Christians.</text:p>
      <text:p text:style-name="P9"><text:tab/>C. This is probably one of the best verses to show for a pre-tribulation rapture, which most of the church believes. You can argue for post-trib/pre-wrath, but lets keep things simple. Either way we know that tribulation is coming to the world and it is coming a lot sooner today than yesterday.</text:p>
      <text:p text:style-name="P8"><text:soft-page-break/>Vs. 11</text:p>
      <text:p text:style-name="P9"><text:tab/>A. It seems I can put again, at the beginning of most of these notes I do. Because If it is important God states it more than once or twice. He repeats it over and over. He has to because we as humans have a tendency to forget the goodness and promises of God.</text:p>
      <text:p text:style-name="P9"><text:tab/>B. <text:span text:style-name="T6">We are told again that we will get a crown, but not only that, no one will take it from us. We are to hold fast, or to keep holding on with all our strength during trials and tribulations of this world.</text:span></text:p>
      <text:p text:style-name="P9"><text:tab/><text:span text:style-name="T6">C. This crown will not only gain us entrance into the kingdom of Heaven, it is a reward for us diligently seeking Him. Hebrews 11:6 “</text:span><text:span text:style-name="T7">And without faith it is impossible to please God, because anyone who comes to him must believe that he exists and that he rewards those who earnestly seek him.</text:span><text:span text:style-name="T6">”</text:span></text:p>
      <text:p text:style-name="P10">Vs. 12-<text:span text:style-name="T1">13</text:span></text:p>
      <text:p text:style-name="P10"><text:span text:style-name="T8"><text:tab/>A. </text:span><text:span text:style-name="T9">This verse is for us, if we are familiar with the ending of Revelation, we will know that a new Jerusalem will come down. This was the first time the readers of this day found this out. They knew about Heaven but a new Jerusalem with their names written on the pillars that was something to be hopeful for.</text:span></text:p>
      <text:p text:style-name="P11"><text:tab/>B. So Jesus is telling the readers and listeners for the first time about a new place with a new temple and that His name will be written upon us to identify us to the world. We can see Satan try to parallel this with the mark of the beast later in Revelation.</text:p>
      <text:p text:style-name="P12"><text:tab/>C. Oh what hope we have in Jesus our savior. So many promises to us, we are truly a blessed and redeemed people. And we can overcome everything the world has because “Greater is the one living inside of me, than he who is living in the world” 1 John 4:4 paraphrased. </text:p>
      <text:p text:style-name="P12"><text:tab/>D. This statement again is one that means if you truly know Christ and truly know His teachings you will be able to understand what is being taught by Christ.</text:p>
      <text:p text:style-name="P13">Closing</text:p>
      <text:p text:style-name="P14"><text:soft-page-break/><text:span text:style-name="T10">The church in Philadelphia, like the Church of Sardis, is one of two who are not chastised for something in these letters. Both churches have persecution in common, but they also have strong faith and perseverance. As times grow shorter and shorter, I know this has been said for a couple thousand years at this point, we are to remain steadfast. God’s timing is not our timing so soon is relative to the person speaking. We know that Jesus will be returning soon. Let us pray He finds us worshiping and not slacking. Philadelphia is a prime example of staying calm under pressure. As noted above there was a huge persecution going on at that time and a lot of churches were crumbling a lot of people were turning their backs on Christ, but Philadelphia remained steadfast. And as the times seem to be repeating themselves in our society we must remain steadfast and sturdy as well.</text:span></text:p>
      <text:p text:style-name="P13">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10:30:37.536395064</meta:creation-date>
    <dc:date>2026-06-13T12:08:08.852727604</dc:date>
    <meta:editing-duration>PT8S</meta:editing-duration>
    <meta:editing-cycles>1</meta:editing-cycles>
    <meta:document-statistic meta:table-count="0" meta:image-count="0" meta:object-count="0" meta:page-count="4" meta:paragraph-count="31" meta:word-count="1215" meta:character-count="6446" meta:non-whitespace-character-count="5240"/>
    <meta:generator>LibreOffice/26.2.4.2$Linux_X86_64 LibreOffice_project/c44d3140fc62714965bf5d98735e0d79ba4b1ebd</meta:generator>
  </office:meta>
</office:document-meta>
</file>