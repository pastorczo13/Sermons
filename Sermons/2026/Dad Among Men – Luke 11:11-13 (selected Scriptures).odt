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6ffae" officeooo:paragraph-rsid="0006ffae"/>
    </style:style>
    <style:style style:name="P2" style:family="paragraph" style:parent-style-name="Standard">
      <style:paragraph-properties fo:line-height="200%" fo:text-align="left" style:justify-single-word="false" fo:text-indent="0.5in" style:auto-text-indent="true"/>
      <style:text-properties fo:font-style="normal" style:text-underline-style="solid" style:text-underline-width="auto" style:text-underline-color="font-color" fo:font-weight="bold" officeooo:rsid="0006ffae" officeooo:paragraph-rsid="0006ffae" style:font-style-asian="normal" style:font-weight-asian="bold" style:font-style-complex="normal" style:font-weight-complex="bold"/>
    </style:style>
    <style:style style:name="P3" style:family="paragraph" style:parent-style-name="Standard">
      <style:paragraph-properties fo:line-height="200%" fo:text-align="left" style:justify-single-word="false" fo:text-indent="0.5in" style:auto-text-indent="true"/>
      <style:text-properties fo:font-style="normal" style:text-underline-style="none" fo:font-weight="normal" officeooo:rsid="0006ffae" officeooo:paragraph-rsid="0006ffae" style:font-style-asian="normal" style:font-weight-asian="normal" style:font-style-complex="normal" style:font-weight-complex="normal"/>
    </style:style>
    <style:style style:name="P4" style:family="paragraph" style:parent-style-name="Standard">
      <style:paragraph-properties fo:line-height="200%" fo:text-align="left" style:justify-single-word="false" fo:text-indent="0.5in" style:auto-text-indent="true"/>
      <style:text-properties fo:font-style="italic" style:text-underline-style="none" fo:font-weight="normal" officeooo:rsid="0006ffae" officeooo:paragraph-rsid="0006ffae" style:font-style-asian="italic" style:font-weight-asian="normal" style:font-style-complex="italic" style:font-weight-complex="normal"/>
    </style:style>
    <style:style style:name="P5" style:family="paragraph" style:parent-style-name="Standard">
      <style:paragraph-properties fo:line-height="200%" fo:text-align="left" style:justify-single-word="false" fo:text-indent="0.5in" style:auto-text-indent="true"/>
      <style:text-properties fo:font-style="normal" style:text-underline-style="solid" style:text-underline-width="auto" style:text-underline-color="font-color" fo:font-weight="bold" officeooo:rsid="00081dd6" officeooo:paragraph-rsid="00081dd6" style:font-style-asian="normal" style:font-weight-asian="bold" style:font-style-complex="normal" style:font-weight-complex="bold"/>
    </style:style>
    <style:style style:name="P6" style:family="paragraph" style:parent-style-name="Standard">
      <style:paragraph-properties fo:line-height="200%" fo:text-align="left" style:justify-single-word="false" fo:text-indent="0.5in" style:auto-text-indent="true"/>
      <style:text-properties fo:font-style="normal" style:text-underline-style="none" fo:font-weight="normal" officeooo:rsid="00081dd6" officeooo:paragraph-rsid="00081dd6" style:font-style-asian="normal" style:font-weight-asian="normal" style:font-style-complex="normal" style:font-weight-complex="normal"/>
    </style:style>
    <style:style style:name="P7" style:family="paragraph" style:parent-style-name="Standard">
      <style:paragraph-properties fo:line-height="200%" fo:text-align="left" style:justify-single-word="false" fo:text-indent="0.5in" style:auto-text-indent="true"/>
      <style:text-properties fo:font-style="normal" style:text-underline-style="solid" style:text-underline-width="auto" style:text-underline-color="font-color" fo:font-weight="bold" officeooo:rsid="0008a54b" officeooo:paragraph-rsid="0008a54b" style:font-style-asian="normal" style:font-weight-asian="bold" style:font-style-complex="normal" style:font-weight-complex="bold"/>
    </style:style>
    <style:style style:name="P8" style:family="paragraph" style:parent-style-name="Standard">
      <style:paragraph-properties fo:line-height="200%" fo:text-align="left" style:justify-single-word="false" fo:text-indent="0.5in" style:auto-text-indent="true"/>
      <style:text-properties fo:font-style="normal" style:text-underline-style="none" fo:font-weight="normal" officeooo:rsid="0008a54b" officeooo:paragraph-rsid="0008a54b"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officeooo:rsid="00081dd6"/>
    </style:style>
    <style:style style:name="T3" style:family="text">
      <style:text-properties fo:font-style="italic" officeooo:rsid="00081dd6" style:font-style-asian="italic" style:font-style-complex="italic"/>
    </style:style>
    <style:style style:name="T4" style:family="text">
      <style:text-properties fo:font-style="normal" officeooo:rsid="00081dd6" style:font-style-asian="normal" style:font-style-complex="norm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08a5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d Among Men – Luke 11:11-13 (selected Scriptures)</text:p>
      <text:p text:style-name="P1">Key Text <text:span text:style-name="T1">“11 If a son shall ask bread of any of you that is a father, will he give him a stone? or if he ask a fish, will he for a fish give him a serpent? Or if he shall ask an egg, will he offer him a scorpion? If ye then, being evil, know how to give good gifts unto your children: how much more shall your heavenly Father give the Holy Spirit to them that ask him?”</text:span></text:p>
      <text:p text:style-name="P2">Preface</text:p>
      <text:p text:style-name="P3"><text:tab/>Today we celebrate Fathers Day. We celebrate those dads in our lives who were always there for us with a stern warning, a smack if we deserved it and a soft touch when it was needed. For some of us it is a day to celebrate our best friend, as a son it was my first friend and the one that is constant in my life. Fathers Day is a special day for all of us, and most sermons preached will make Fathers feel like they do not measure up. We are being compared to the ultimate Father which none of us measure up to, but today we celebrate not tear down.</text:p>
      <text:p text:style-name="P2">Dad One – Luke 15:11-32 “Prodigal Son”</text:p>
      <text:p text:style-name="P3"><text:tab/>A. Most of us know the story of the prodigal son. We see a son essentially ask for His fathers wealth and the ask was to say to to the Father I wish your would die so I could be rich instead.</text:p>
      <text:p text:style-name="P3"><text:tab/>B. The Father relents, like most loving fathers would, and knew what would happen to the son.</text:p>
      <text:p text:style-name="P3"><text:tab/>C. Well the son eventually had no where else to run and came back home. </text:p>
      <text:p text:style-name="P3"><text:tab/>D. Instead of hatred the Father ran to him and put him back in a place of honor</text:p>
      <text:p text:style-name="P3"><text:tab/><text:span text:style-name="T2">E. vs. 20 “</text:span><text:span text:style-name="T3">20 So he got up and went to his father. </text:span><text:span text:style-name="T1">“But while he was still a long way off, his father saw him and was filled with compassion for him; he ran to his son, threw his arms around him and kissed him. </text:span><text:span text:style-name="T2">Vs. 32 “</text:span><text:span text:style-name="T3">32 But we had to celebrate and be glad, because this brother of yours was dead and is alive again; he was lost and is found.’”</text:span></text:p>
      <text:p text:style-name="P2">Dad Two – Abraham – Gen 22</text:p>
      <text:p text:style-name="P3"><text:tab/>A. Abraham waited a long time for a promised son. Some Fathers do not become that until late in life, but all fathers share the same love for their children no matter their age.</text:p>
      <text:p text:style-name="P3"><text:soft-page-break/><text:tab/>B. We see in Abraham something that all Christian Fathers instill in their children...complete obedience unto the Lord. Verse 12 “12 “<text:span text:style-name="T1">Do not lay a hand on the boy,” he said. “Do not do anything to him. Now I know that you fear God, because you have not withheld from me your son, your only son.”</text:span></text:p>
      <text:p text:style-name="P4"><text:tab/><text:span text:style-name="T4">C. Abraham, like all Christian Fathers, have one goal in life and that is to teach their children the ways of the Lord. As Christian Fathers the love we have for our Children is incomparable to anything earthly. </text:span></text:p>
      <text:p text:style-name="P5">Dad Three – Job – Job 1:1-4 (read)</text:p>
      <text:p text:style-name="P6"><text:tab/>A. We all know the famous story of Job, we know who it ends we know all the travesty that occurred to his family, but we will focus not on the bad in his life but the good.</text:p>
      <text:p text:style-name="P6"><text:tab/>B. In the first 4 verses of the Book of Job we see something that a loving Father does for His children. He worries. Lol. <text:s/>Job was worried that his children possibly sinned so he made sure they were purified</text:p>
      <text:p text:style-name="P6"><text:tab/>C. Unlike what the world wants fathers to look like now, fathers are not ignorant. We are not blind or stupid. We know a lot more than people give us credit for and we worry a lot about our children. We want only peace and comfort for our children, and we will try to take steps for that to be the case.</text:p>
      <text:p text:style-name="P6"><text:tab/>D. Job knew his children were not doing what they should be doing, but was willing to put himself out to make sure that they knew the Lord and made sure they were pure before the Lord.</text:p>
      <text:p text:style-name="P7">Dad Four – Joseph – Matthew 1:18-25</text:p>
      <text:p text:style-name="P8"><text:tab/>A. Image as a father learning that your wife to be was pregnant while still claiming to be a virgin. In today’s soc<text:span text:style-name="T5">Prayer</text:span>iety it is laughable. In Joseph’s society it meant you were ostracized and sometimes for the woman killed.</text:p>
      <text:p text:style-name="P8"><text:tab/>B. Joseph was a great Father. He was a faithful in that He trusted the Lord, but we can also see how great of a man he is because he did not want to see Mary put out or killed so he made arrangements for her to live peacefully without shame.</text:p>
      <text:p text:style-name="P8"><text:soft-page-break/><text:tab/>C. We know here that the angel told Joseph that Jesus was the son of God and we know how the story unfolds, but we can see a fathers heart and love when it comes to a child’s mother. He was willing to take on the burden of someone else’s child and not holding back love to his mother. </text:p>
      <text:p text:style-name="P7">Dad Five – God – John 3:16</text:p>
      <text:p text:style-name="P8"><text:tab/>A. <text:span text:style-name="T1">16 For God so loved the world, that he gave his only begotten Son, that whosoever believeth in him should not perish, but have everlasting life.</text:span></text:p>
      <text:p text:style-name="P8"><text:tab/>B. Obviously we have to finish with the ultimate Father. He is a great Father and the Father all dads strive for. We see something in this verse that all fathers must do for their families and that is sacrifice.</text:p>
      <text:p text:style-name="P6"><text:tab/><text:span text:style-name="T6">C. It was this ultimate sacrifice that allows us to partake in Heaven’s beauty with Jesus Christ. He is Our Father, He is Our Savior, and Is Our First Love</text:span></text:p>
      <text:p text:style-name="P7">Closing</text:p>
      <text:p text:style-name="P8"><text:s/>We looked at five fathers from the bible today, we decided to not focus on their faults, not focus on their failings as fathers, as all of us have those in common. Instead we showed how much our Fathers mean to us. How much they sacrifice for each of us, and how much they lean on the Lord for our benefit. Fathers are the rock in most Christian families, they are the reason most of us had to get up and go to church, they were the teachers of how to work hard and provide, and they were the ones who had to be strong when the world crumbled around them. Today we celebrate all Fathers. </text:p>
      <text:p text:style-name="P7">Prayer</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5T16:50:51.474562343</meta:creation-date>
    <dc:title>default</dc:title>
    <meta:editing-duration>PT15S</meta:editing-duration>
    <meta:editing-cycles>2</meta:editing-cycles>
    <meta:generator>LibreOffice/26.2.1.1$Linux_X86_64 LibreOffice_project/620$Build-1</meta:generator>
    <dc:date>2026-06-25T17:25:49.680533410</dc:date>
    <meta:document-statistic meta:table-count="0" meta:image-count="0" meta:object-count="0" meta:page-count="3" meta:paragraph-count="30" meta:word-count="1064" meta:character-count="5352" meta:non-whitespace-character-count="4283"/>
    <meta:template xlink:type="simple" xlink:actuate="onRequest" xlink:title="default" xlink:href="../../../../../Templates/default.ott" meta:date="2026-06-25T16:50:51.221957471"/>
  </office:meta>
</office:document-meta>
</file>